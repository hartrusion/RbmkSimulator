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583in"/>
    </style:style>
    <style:style style:name="co2" style:family="table-column">
      <style:table-column-properties fo:break-before="auto" style:column-width="0.6299in"/>
    </style:style>
    <style:style style:name="co3" style:family="table-column">
      <style:table-column-properties fo:break-before="auto" style:column-width="0.5898in"/>
    </style:style>
    <style:style style:name="co4" style:family="table-column">
      <style:table-column-properties fo:break-before="auto" style:column-width="0.7366in"/>
    </style:style>
    <style:style style:name="co5" style:family="table-column">
      <style:table-column-properties fo:break-before="auto" style:column-width="0.348in"/>
    </style:style>
    <style:style style:name="co6" style:family="table-column">
      <style:table-column-properties fo:break-before="auto" style:column-width="6.7693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5.9673in"/>
    </style:style>
    <style:style style:name="co9" style:family="table-column">
      <style:table-column-properties fo:break-before="auto" style:column-width="1.539in"/>
    </style:style>
    <style:style style:name="co10" style:family="table-column">
      <style:table-column-properties fo:break-before="auto" style:column-width="0.5673in"/>
    </style:style>
    <style:style style:name="co11" style:family="table-column">
      <style:table-column-properties fo:break-before="auto" style:column-width="0.7189in"/>
    </style:style>
    <style:style style:name="co12" style:family="table-column">
      <style:table-column-properties fo:break-before="auto" style:column-width="0.7063in"/>
    </style:style>
    <style:style style:name="co13" style:family="table-column">
      <style:table-column-properties fo:break-before="auto" style:column-width="6.8in"/>
    </style:style>
    <style:style style:name="co14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2a6099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color="#2a6099" fo:font-weight="bold" style:font-weight-asian="bold" style:font-weight-complex="bold"/>
    </style:style>
    <style:style style:name="ce4" style:family="table-cell" style:parent-style-name="Default" style:data-style-name="N81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 style:data-style-name="N81">
      <style:text-properties style:use-window-font-color="true" fo:font-style="normal" style:font-style-asian="normal" style:font-style-complex="normal"/>
    </style:style>
    <style:style style:name="ce6" style:family="table-cell" style:parent-style-name="Default">
      <style:map style:condition="cell-content()&lt;0" style:apply-style-name="Bad" style:base-cell-address="Condensation.H23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0" style:family="table-cell" style:parent-style-name="Default">
      <style:map style:condition="cell-content()&lt;0" style:apply-style-name="Bad" style:base-cell-address="'Feedwater Main'.H7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color="#ff0000" fo:font-weight="bold" style:font-weight-asian="bold" style:font-weight-complex="bold"/>
    </style:style>
    <style:style style:name="ce16" style:family="table-cell" style:parent-style-name="Defaul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24" style:family="table-cell" style:parent-style-name="Default">
      <style:text-properties fo:color="#ff0000"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 style:data-style-name="N1">
      <style:text-properties fo:color="#2a6099"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>
      <style:text-properties fo:color="#2a6099"/>
    </style:style>
    <style:style style:name="ce27" style:family="table-cell" style:parent-style-name="Default" style:data-style-name="N1">
      <style:map style:condition="cell-content()&lt;0" style:apply-style-name="Bad" style:base-cell-address="'Feedwater Startup'.H5"/>
    </style:style>
    <style:style style:name="ce28" style:family="table-cell" style:parent-style-name="Default" style:data-style-name="N1"/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0" style:family="table-cell" style:parent-style-name="Default" style:data-style-name="N8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ndensation" table:style-name="ta1">
        <table:shapes>
          <draw:frame draw:z-index="0" draw:style-name="gr1" draw:text-style-name="P1" svg:width="6.2988in" svg:height="3.5429in" svg:x="3.7665in" svg:y="0.0878in">
            <draw:object draw:notify-on-update-of-ranges="Condensation.G5:Condensation.G15 Condensation.M4:Condensation.M4 Condensation.M5:Condensation.M15 Condensation.G5:Condensation.G15 Condensation.N4:Condensation.N4 Condensation.N5:Condensation.N15 Condensation.G5:Condensation.G15 Condensation.O4:Condensation.O4 Condensation.O5:Condensation.O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4.9776in" svg:x="3.7705in" svg:y="3.4823in">
            <draw:object draw:notify-on-update-of-ranges="Condensation.G23:Condensation.G33 Condensation.M22:Condensation.M22 Condensation.M23:Condensation.M33 Condensation.G23:Condensation.G33 Condensation.N22:Condensation.N22 Condensation.N23:Condensation.N33 Condensation.G23:Condensation.G33 Condensation.O22:Condensation.O22 Condensation.O23:Condensation.O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9" table:default-cell-style-name="Default"/>
        <table:table-row table:style-name="ro1">
          <table:table-cell table:style-name="ce1" office:value-type="string" calcext:value-type="string">
            <text:p>Pump Parameters</text:p>
          </table:table-cell>
          <table:table-cell table:number-columns-repeated="5"/>
          <table:table-cell office:value-type="string" calcext:value-type="string">
            <text:p>Calculation for 1 to 3 Pumps with simple valve Characterist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alHead</text:p>
          </table:table-cell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bar</text:p>
          </table:table-cell>
          <table:table-cell table:style-name="ce4" table:formula="of:=[.B2]*100000" office:value-type="float" office:value="1400000" calcext:value-type="float">
            <text:p>1.40E+06</text:p>
          </table:table-cell>
          <table:table-cell office:value-type="string" calcext:value-type="string">
            <text:p>P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rkingPressure</text:p>
          </table:table-cell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bar</text:p>
          </table:table-cell>
          <table:table-cell table:style-name="ce4" table:formula="of:=[.B3]*100000" office:value-type="float" office:value="800000" calcext:value-type="float">
            <text:p>8.00E+05</text:p>
          </table:table-cell>
          <table:table-cell office:value-type="string" calcext:value-type="string">
            <text:p>Pa</text:p>
          </table:table-cell>
          <table:table-cell table:number-columns-repeated="2"/>
          <table:table-cell office:value-type="string" calcext:value-type="string">
            <text:p>Resistance</text:p>
          </table:table-cell>
          <table:table-cell office:value-type="string" calcext:value-type="string">
            <text:p>Valve<text:span text:style-name="T1">s</text:span> and</text:p>
          </table:table-cell>
          <table:table-cell table:style-name="ce15" office:value-type="string" calcext:value-type="string" table:number-columns-spanned="3" table:number-rows-spanned="1">
            <text:p>Total Resistance (Valves + Plant) with…</text:p>
          </table:table-cell>
          <table:covered-table-cell table:number-columns-repeated="2"/>
          <table:table-cell table:style-name="ce15" office:value-type="string" calcext:value-type="string" table:number-columns-spanned="3" table:number-rows-spanned="1">
            <text:p>Resulting Flow</text:p>
          </table:table-cell>
          <table:covered-table-cell table:number-columns-repeated="2" table:style-name="ce15"/>
        </table:table-row>
        <table:table-row table:style-name="ro1">
          <table:table-cell office:value-type="string" calcext:value-type="string">
            <text:p>workingFlow</text:p>
          </table:table-cell>
          <table:table-cell table:style-name="ce2" office:value-type="float" office:value="600" calcext:value-type="float">
            <text:p>600</text:p>
          </table:table-cell>
          <table:table-cell office:value-type="string" calcext:value-type="string">
            <text:p>kg/s</text:p>
          </table:table-cell>
          <table:table-cell table:number-columns-repeated="3"/>
          <table:table-cell office:value-type="string" calcext:value-type="string">
            <text:p>Valve Open</text:p>
          </table:table-cell>
          <table:table-cell office:value-type="string" calcext:value-type="string">
            <text:p>per Valve</text:p>
          </table:table-cell>
          <table:table-cell office:value-type="string" calcext:value-type="string">
            <text:p>Plant Res.</text:p>
          </table:table-cell>
          <table:table-cell office:value-type="string" calcext:value-type="string">
            <text:p>1 Pump</text:p>
          </table:table-cell>
          <table:table-cell office:value-type="string" calcext:value-type="string">
            <text:p>2 Pumps</text:p>
          </table:table-cell>
          <table:table-cell office:value-type="string" calcext:value-type="string">
            <text:p>3 Pumps</text:p>
          </table:table-cell>
          <table:table-cell office:value-type="string" calcext:value-type="string">
            <text:p>1 Pump</text:p>
          </table:table-cell>
          <table:table-cell office:value-type="string" calcext:value-type="string">
            <text:p>2 Pumps</text:p>
          </table:table-cell>
          <table:table-cell office:value-type="string" calcext:value-type="string">
            <text:p>3 Pumps</text:p>
          </table:table-cell>
        </table:table-row>
        <table:table-row table:style-name="ro1">
          <table:table-cell table:number-columns-repeated="6"/>
          <table:table-cell office:value-type="float" office:value="0.1" calcext:value-type="float">
            <text:p>0.1</text:p>
          </table:table-cell>
          <table:table-cell table:formula="of:=[.B$16]*100/[.G5]" office:value-type="float" office:value="900000" calcext:value-type="float">
            <text:p>900000</text:p>
          </table:table-cell>
          <table:table-cell table:formula="of:=([.H5]/[.B$13])+[.B$25]" office:value-type="float" office:value="450450" calcext:value-type="float">
            <text:p>450450</text:p>
          </table:table-cell>
          <table:table-cell table:formula="of:=[.$I5]+[.$B$8]" office:value-type="float" office:value="452450" calcext:value-type="float">
            <text:p>452450</text:p>
          </table:table-cell>
          <table:table-cell table:formula="of:=[.$I5]+[.$B$9]" office:value-type="float" office:value="451450" calcext:value-type="float">
            <text:p>451450</text:p>
          </table:table-cell>
          <table:table-cell table:formula="of:=[.$I5]+[.$B$10]" office:value-type="float" office:value="451116.666666667" calcext:value-type="float">
            <text:p>451116.666666667</text:p>
          </table:table-cell>
          <table:table-cell table:formula="of:=([.$B$6]*[.$D$2]-[.$D$26])/[.J5]" office:value-type="float" office:value="4.53088739087192" calcext:value-type="float">
            <text:p>4.53088739087192</text:p>
          </table:table-cell>
          <table:table-cell table:formula="of:=([.$B$6]*[.$D$2]-[.$D$26])/[.K5]" office:value-type="float" office:value="4.54092369033116" calcext:value-type="float">
            <text:p>4.54092369033116</text:p>
          </table:table-cell>
          <table:table-cell table:formula="of:=([.$B$6]*[.$D$2]-[.$D$26])/[.L5]" office:value-type="float" office:value="4.54427901134222" calcext:value-type="float">
            <text:p>4.54427901134222</text:p>
          </table:table-cell>
        </table:table-row>
        <table:table-row table:style-name="ro1">
          <table:table-cell office:value-type="string" calcext:value-type="string">
            <text:p>Pums in series: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B$16]*100/[.G6]" office:value-type="float" office:value="9000" calcext:value-type="float">
            <text:p>9000</text:p>
          </table:table-cell>
          <table:table-cell table:formula="of:=([.H6]/[.B$13])+[.B$25]" office:value-type="float" office:value="4950" calcext:value-type="float">
            <text:p>4950</text:p>
          </table:table-cell>
          <table:table-cell table:formula="of:=[.$I6]+[.$B$8]" office:value-type="float" office:value="6950" calcext:value-type="float">
            <text:p>6950</text:p>
          </table:table-cell>
          <table:table-cell table:formula="of:=[.$I6]+[.$B$9]" office:value-type="float" office:value="5950" calcext:value-type="float">
            <text:p>5950</text:p>
          </table:table-cell>
          <table:table-cell table:formula="of:=[.$I6]+[.$B$10]" office:value-type="float" office:value="5616.66666666667" calcext:value-type="float">
            <text:p>5616.66666666667</text:p>
          </table:table-cell>
          <table:table-cell table:formula="of:=([.$B$6]*[.$D$2]-[.$D$26])/[.J6]" office:value-type="float" office:value="294.964028776978" calcext:value-type="float">
            <text:p>294.964028776978</text:p>
          </table:table-cell>
          <table:table-cell table:formula="of:=([.$B$6]*[.$D$2]-[.$D$26])/[.K6]" office:value-type="float" office:value="344.53781512605" calcext:value-type="float">
            <text:p>344.53781512605</text:p>
          </table:table-cell>
          <table:table-cell table:formula="of:=([.$B$6]*[.$D$2]-[.$D$26])/[.L6]" office:value-type="float" office:value="364.985163204748" calcext:value-type="float">
            <text:p>364.985163204748</text:p>
          </table:table-cell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table:formula="of:=[.B$16]*100/[.G7]" office:value-type="float" office:value="4500" calcext:value-type="float">
            <text:p>4500</text:p>
          </table:table-cell>
          <table:table-cell table:formula="of:=([.H7]/[.B$13])+[.B$25]" office:value-type="float" office:value="2700" calcext:value-type="float">
            <text:p>2700</text:p>
          </table:table-cell>
          <table:table-cell table:formula="of:=[.$I7]+[.$B$8]" office:value-type="float" office:value="4700" calcext:value-type="float">
            <text:p>4700</text:p>
          </table:table-cell>
          <table:table-cell table:formula="of:=[.$I7]+[.$B$9]" office:value-type="float" office:value="3700" calcext:value-type="float">
            <text:p>3700</text:p>
          </table:table-cell>
          <table:table-cell table:formula="of:=[.$I7]+[.$B$10]" office:value-type="float" office:value="3366.66666666667" calcext:value-type="float">
            <text:p>3366.66666666667</text:p>
          </table:table-cell>
          <table:table-cell table:formula="of:=([.$B$6]*[.$D$2]-[.$D$26])/[.J7]" office:value-type="float" office:value="436.170212765957" calcext:value-type="float">
            <text:p>436.170212765957</text:p>
          </table:table-cell>
          <table:table-cell table:formula="of:=([.$B$6]*[.$D$2]-[.$D$26])/[.K7]" office:value-type="float" office:value="554.054054054054" calcext:value-type="float">
            <text:p>554.054054054054</text:p>
          </table:table-cell>
          <table:table-cell table:formula="of:=([.$B$6]*[.$D$2]-[.$D$26])/[.L7]" office:value-type="float" office:value="608.910891089109" calcext:value-type="float">
            <text:p>608.910891089109</text:p>
          </table:table-cell>
        </table:table-row>
        <table:table-row table:style-name="ro1">
          <table:table-cell office:value-type="string" calcext:value-type="string">
            <text:p>flowResistance</text:p>
          </table:table-cell>
          <table:table-cell table:formula="of:=([.D2]-[.D3])/[.B4]*[.B6]" office:value-type="float" office:value="2000" calcext:value-type="float">
            <text:p>2000</text:p>
          </table:table-cell>
          <table:table-cell office:value-type="string" calcext:value-type="string">
            <text:p>Pa*s/kg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B$16]*100/[.G8]" office:value-type="float" office:value="3000" calcext:value-type="float">
            <text:p>3000</text:p>
          </table:table-cell>
          <table:table-cell table:formula="of:=([.H8]/[.B$13])+[.B$25]" office:value-type="float" office:value="1950" calcext:value-type="float">
            <text:p>1950</text:p>
          </table:table-cell>
          <table:table-cell table:formula="of:=[.$I8]+[.$B$8]" office:value-type="float" office:value="3950" calcext:value-type="float">
            <text:p>3950</text:p>
          </table:table-cell>
          <table:table-cell table:formula="of:=[.$I8]+[.$B$9]" office:value-type="float" office:value="2950" calcext:value-type="float">
            <text:p>2950</text:p>
          </table:table-cell>
          <table:table-cell table:formula="of:=[.$I8]+[.$B$10]" office:value-type="float" office:value="2616.66666666667" calcext:value-type="float">
            <text:p>2616.66666666667</text:p>
          </table:table-cell>
          <table:table-cell table:formula="of:=([.$B$6]*[.$D$2]-[.$D$26])/[.J8]" office:value-type="float" office:value="518.987341772152" calcext:value-type="float">
            <text:p>518.987341772152</text:p>
          </table:table-cell>
          <table:table-cell table:formula="of:=([.$B$6]*[.$D$2]-[.$D$26])/[.K8]" office:value-type="float" office:value="694.915254237288" calcext:value-type="float">
            <text:p>694.915254237288</text:p>
          </table:table-cell>
          <table:table-cell table:formula="of:=([.$B$6]*[.$D$2]-[.$D$26])/[.L8]" office:value-type="float" office:value="783.43949044586" calcext:value-type="float">
            <text:p>783.43949044586</text:p>
          </table:table-cell>
        </table:table-row>
        <table:table-row table:style-name="ro1">
          <table:table-cell office:value-type="string" calcext:value-type="string">
            <text:p>2 Pumps:</text:p>
          </table:table-cell>
          <table:table-cell table:formula="of:=[.B8]/2" office:value-type="float" office:value="1000" calcext:value-type="float">
            <text:p>1000</text:p>
          </table:table-cell>
          <table:table-cell office:value-type="string" calcext:value-type="string">
            <text:p>Pa*s/kg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[.B$16]*100/[.G9]" office:value-type="float" office:value="2250" calcext:value-type="float">
            <text:p>2250</text:p>
          </table:table-cell>
          <table:table-cell table:formula="of:=([.H9]/[.B$13])+[.B$25]" office:value-type="float" office:value="1575" calcext:value-type="float">
            <text:p>1575</text:p>
          </table:table-cell>
          <table:table-cell table:formula="of:=[.$I9]+[.$B$8]" office:value-type="float" office:value="3575" calcext:value-type="float">
            <text:p>3575</text:p>
          </table:table-cell>
          <table:table-cell table:formula="of:=[.$I9]+[.$B$9]" office:value-type="float" office:value="2575" calcext:value-type="float">
            <text:p>2575</text:p>
          </table:table-cell>
          <table:table-cell table:formula="of:=[.$I9]+[.$B$10]" office:value-type="float" office:value="2241.66666666667" calcext:value-type="float">
            <text:p>2241.66666666667</text:p>
          </table:table-cell>
          <table:table-cell table:formula="of:=([.$B$6]*[.$D$2]-[.$D$26])/[.J9]" office:value-type="float" office:value="573.426573426573" calcext:value-type="float">
            <text:p>573.426573426573</text:p>
          </table:table-cell>
          <table:table-cell table:formula="of:=([.$B$6]*[.$D$2]-[.$D$26])/[.K9]" office:value-type="float" office:value="796.116504854369" calcext:value-type="float">
            <text:p>796.116504854369</text:p>
          </table:table-cell>
          <table:table-cell table:formula="of:=([.$B$6]*[.$D$2]-[.$D$26])/[.L9]" office:value-type="float" office:value="914.498141263941" calcext:value-type="float">
            <text:p>914.498141263941</text:p>
          </table:table-cell>
        </table:table-row>
        <table:table-row table:style-name="ro1">
          <table:table-cell office:value-type="string" calcext:value-type="string">
            <text:p>3 Pumps:</text:p>
          </table:table-cell>
          <table:table-cell table:formula="of:=[.B8]/3" office:value-type="float" office:value="666.666666666667" calcext:value-type="float">
            <text:p>666.666666666667</text:p>
          </table:table-cell>
          <table:table-cell office:value-type="string" calcext:value-type="string">
            <text:p>Pa*s/kg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[.B$16]*100/[.G10]" office:value-type="float" office:value="1800" calcext:value-type="float">
            <text:p>1800</text:p>
          </table:table-cell>
          <table:table-cell table:formula="of:=([.H10]/[.B$13])+[.B$25]" office:value-type="float" office:value="1350" calcext:value-type="float">
            <text:p>1350</text:p>
          </table:table-cell>
          <table:table-cell table:formula="of:=[.$I10]+[.$B$8]" office:value-type="float" office:value="3350" calcext:value-type="float">
            <text:p>3350</text:p>
          </table:table-cell>
          <table:table-cell table:formula="of:=[.$I10]+[.$B$9]" office:value-type="float" office:value="2350" calcext:value-type="float">
            <text:p>2350</text:p>
          </table:table-cell>
          <table:table-cell table:formula="of:=[.$I10]+[.$B$10]" office:value-type="float" office:value="2016.66666666667" calcext:value-type="float">
            <text:p>2016.66666666667</text:p>
          </table:table-cell>
          <table:table-cell table:formula="of:=([.$B$6]*[.$D$2]-[.$D$26])/[.J10]" office:value-type="float" office:value="611.940298507463" calcext:value-type="float">
            <text:p>611.940298507463</text:p>
          </table:table-cell>
          <table:table-cell table:formula="of:=([.$B$6]*[.$D$2]-[.$D$26])/[.K10]" office:value-type="float" office:value="872.340425531915" calcext:value-type="float">
            <text:p>872.340425531915</text:p>
          </table:table-cell>
          <table:table-cell table:formula="of:=([.$B$6]*[.$D$2]-[.$D$26])/[.L10]" office:value-type="float" office:value="1016.52892561983" calcext:value-type="float">
            <text:p>1016.52892561983</text:p>
          </table:table-cell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table:formula="of:=[.B$16]*100/[.G11]" office:value-type="float" office:value="1500" calcext:value-type="float">
            <text:p>1500</text:p>
          </table:table-cell>
          <table:table-cell table:formula="of:=([.H11]/[.B$13])+[.B$25]" office:value-type="float" office:value="1200" calcext:value-type="float">
            <text:p>1200</text:p>
          </table:table-cell>
          <table:table-cell table:formula="of:=[.$I11]+[.$B$8]" office:value-type="float" office:value="3200" calcext:value-type="float">
            <text:p>3200</text:p>
          </table:table-cell>
          <table:table-cell table:formula="of:=[.$I11]+[.$B$9]" office:value-type="float" office:value="2200" calcext:value-type="float">
            <text:p>2200</text:p>
          </table:table-cell>
          <table:table-cell table:formula="of:=[.$I11]+[.$B$10]" office:value-type="float" office:value="1866.66666666667" calcext:value-type="float">
            <text:p>1866.66666666667</text:p>
          </table:table-cell>
          <table:table-cell table:formula="of:=([.$B$6]*[.$D$2]-[.$D$26])/[.J11]" office:value-type="float" office:value="640.625" calcext:value-type="float">
            <text:p>640.625</text:p>
          </table:table-cell>
          <table:table-cell table:formula="of:=([.$B$6]*[.$D$2]-[.$D$26])/[.K11]" office:value-type="float" office:value="931.818181818182" calcext:value-type="float">
            <text:p>931.818181818182</text:p>
          </table:table-cell>
          <table:table-cell table:formula="of:=([.$B$6]*[.$D$2]-[.$D$26])/[.L11]" office:value-type="float" office:value="1098.21428571429" calcext:value-type="float">
            <text:p>1098.21428571429</text:p>
          </table:table-cell>
        </table:table-row>
        <table:table-row table:style-name="ro1">
          <table:table-cell table:style-name="ce1" office:value-type="string" calcext:value-type="string">
            <text:p>Valve Configuration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table:formula="of:=[.B$16]*100/[.G12]" office:value-type="float" office:value="1285.71428571429" calcext:value-type="float">
            <text:p>1285.71428571429</text:p>
          </table:table-cell>
          <table:table-cell table:formula="of:=([.H12]/[.B$13])+[.B$25]" office:value-type="float" office:value="1092.85714285714" calcext:value-type="float">
            <text:p>1092.85714285714</text:p>
          </table:table-cell>
          <table:table-cell table:formula="of:=[.$I12]+[.$B$8]" office:value-type="float" office:value="3092.85714285714" calcext:value-type="float">
            <text:p>3092.85714285714</text:p>
          </table:table-cell>
          <table:table-cell table:formula="of:=[.$I12]+[.$B$9]" office:value-type="float" office:value="2092.85714285714" calcext:value-type="float">
            <text:p>2092.85714285714</text:p>
          </table:table-cell>
          <table:table-cell table:formula="of:=[.$I12]+[.$B$10]" office:value-type="float" office:value="1759.52380952381" calcext:value-type="float">
            <text:p>1759.52380952381</text:p>
          </table:table-cell>
          <table:table-cell table:formula="of:=([.$B$6]*[.$D$2]-[.$D$26])/[.J12]" office:value-type="float" office:value="662.817551963049" calcext:value-type="float">
            <text:p>662.817551963049</text:p>
          </table:table-cell>
          <table:table-cell table:formula="of:=([.$B$6]*[.$D$2]-[.$D$26])/[.K12]" office:value-type="float" office:value="979.522184300341" calcext:value-type="float">
            <text:p>979.522184300341</text:p>
          </table:table-cell>
          <table:table-cell table:formula="of:=([.$B$6]*[.$D$2]-[.$D$26])/[.L12]" office:value-type="float" office:value="1165.08795669824" calcext:value-type="float">
            <text:p>1165.08795669824</text:p>
          </table:table-cell>
        </table:table-row>
        <table:table-row table:style-name="ro1">
          <table:table-cell office:value-type="string" calcext:value-type="string">
            <text:p>Parallel Valves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table:formula="of:=[.B$16]*100/[.G13]" office:value-type="float" office:value="1125" calcext:value-type="float">
            <text:p>1125</text:p>
          </table:table-cell>
          <table:table-cell table:formula="of:=([.H13]/[.B$13])+[.B$25]" office:value-type="float" office:value="1012.5" calcext:value-type="float">
            <text:p>1012.5</text:p>
          </table:table-cell>
          <table:table-cell table:formula="of:=[.$I13]+[.$B$8]" office:value-type="float" office:value="3012.5" calcext:value-type="float">
            <text:p>3012.5</text:p>
          </table:table-cell>
          <table:table-cell table:formula="of:=[.$I13]+[.$B$9]" office:value-type="float" office:value="2012.5" calcext:value-type="float">
            <text:p>2012.5</text:p>
          </table:table-cell>
          <table:table-cell table:formula="of:=[.$I13]+[.$B$10]" office:value-type="float" office:value="1679.16666666667" calcext:value-type="float">
            <text:p>1679.16666666667</text:p>
          </table:table-cell>
          <table:table-cell table:formula="of:=([.$B$6]*[.$D$2]-[.$D$26])/[.J13]" office:value-type="float" office:value="680.497925311203" calcext:value-type="float">
            <text:p>680.497925311203</text:p>
          </table:table-cell>
          <table:table-cell table:formula="of:=([.$B$6]*[.$D$2]-[.$D$26])/[.K13]" office:value-type="float" office:value="1018.63354037267" calcext:value-type="float">
            <text:p>1018.63354037267</text:p>
          </table:table-cell>
          <table:table-cell table:formula="of:=([.$B$6]*[.$D$2]-[.$D$26])/[.L13]" office:value-type="float" office:value="1220.84367245658" calcext:value-type="float">
            <text:p>1220.84367245658</text:p>
          </table:table-cell>
        </table:table-row>
        <table:table-row table:style-name="ro1">
          <table:table-cell table:number-columns-repeated="6"/>
          <table:table-cell office:value-type="float" office:value="90" calcext:value-type="float">
            <text:p>90</text:p>
          </table:table-cell>
          <table:table-cell table:formula="of:=[.B$16]*100/[.G14]" office:value-type="float" office:value="1000" calcext:value-type="float">
            <text:p>1000</text:p>
          </table:table-cell>
          <table:table-cell table:formula="of:=([.H14]/[.B$13])+[.B$25]" office:value-type="float" office:value="950" calcext:value-type="float">
            <text:p>950</text:p>
          </table:table-cell>
          <table:table-cell table:formula="of:=[.$I14]+[.$B$8]" office:value-type="float" office:value="2950" calcext:value-type="float">
            <text:p>2950</text:p>
          </table:table-cell>
          <table:table-cell table:formula="of:=[.$I14]+[.$B$9]" office:value-type="float" office:value="1950" calcext:value-type="float">
            <text:p>1950</text:p>
          </table:table-cell>
          <table:table-cell table:formula="of:=[.$I14]+[.$B$10]" office:value-type="float" office:value="1616.66666666667" calcext:value-type="float">
            <text:p>1616.66666666667</text:p>
          </table:table-cell>
          <table:table-cell table:formula="of:=([.$B$6]*[.$D$2]-[.$D$26])/[.J14]" office:value-type="float" office:value="694.915254237288" calcext:value-type="float">
            <text:p>694.915254237288</text:p>
          </table:table-cell>
          <table:table-cell table:formula="of:=([.$B$6]*[.$D$2]-[.$D$26])/[.K14]" office:value-type="float" office:value="1051.28205128205" calcext:value-type="float">
            <text:p>1051.28205128205</text:p>
          </table:table-cell>
          <table:table-cell table:formula="of:=([.$B$6]*[.$D$2]-[.$D$26])/[.L14]" office:value-type="float" office:value="1268.0412371134" calcext:value-type="float">
            <text:p>1268.0412371134</text:p>
          </table:table-cell>
        </table:table-row>
        <table:table-row table:style-name="ro1">
          <table:table-cell office:value-type="string" calcext:value-type="string">
            <text:p>Simple Chacacterisitc: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formula="of:=[.B$16]*100/[.G15]" office:value-type="float" office:value="900" calcext:value-type="float">
            <text:p>900</text:p>
          </table:table-cell>
          <table:table-cell table:formula="of:=([.H15]/[.B$13])+[.B$25]" office:value-type="float" office:value="900" calcext:value-type="float">
            <text:p>900</text:p>
          </table:table-cell>
          <table:table-cell table:formula="of:=[.$I15]+[.$B$8]" office:value-type="float" office:value="2900" calcext:value-type="float">
            <text:p>2900</text:p>
          </table:table-cell>
          <table:table-cell table:formula="of:=[.$I15]+[.$B$9]" office:value-type="float" office:value="1900" calcext:value-type="float">
            <text:p>1900</text:p>
          </table:table-cell>
          <table:table-cell table:formula="of:=[.$I15]+[.$B$10]" office:value-type="float" office:value="1566.66666666667" calcext:value-type="float">
            <text:p>1566.66666666667</text:p>
          </table:table-cell>
          <table:table-cell table:formula="of:=([.$B$6]*[.$D$2]-[.$D$26])/[.J15]" office:value-type="float" office:value="706.896551724138" calcext:value-type="float">
            <text:p>706.896551724138</text:p>
          </table:table-cell>
          <table:table-cell table:formula="of:=([.$B$6]*[.$D$2]-[.$D$26])/[.K15]" office:value-type="float" office:value="1078.94736842105" calcext:value-type="float">
            <text:p>1078.94736842105</text:p>
          </table:table-cell>
          <table:table-cell table:formula="of:=([.$B$6]*[.$D$2]-[.$D$26])/[.L15]" office:value-type="float" office:value="1308.51063829787" calcext:value-type="float">
            <text:p>1308.51063829787</text:p>
          </table:table-cell>
        </table:table-row>
        <table:table-row table:style-name="ro1">
          <table:table-cell office:value-type="string" calcext:value-type="string">
            <text:p>resistanceFullOpen</text:p>
          </table:table-cell>
          <table:table-cell table:style-name="ce2" office:value-type="float" office:value="900" calcext:value-type="float">
            <text:p>900</text:p>
          </table:table-cell>
          <table:table-cell office:value-type="string" calcext:value-type="string">
            <text:p>Pa*s/kg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dvanced Characteristic: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owOpen</text:p>
          </table:table-cell>
          <table:table-cell table:style-name="ce2" office:value-type="float" office:value="620" calcext:value-type="float">
            <text:p>620</text:p>
          </table:table-cell>
          <table:table-cell office:value-type="string" calcext:value-type="string">
            <text:p>kg/s</text:p>
          </table:table-cell>
          <table:table-cell table:number-columns-repeated="3"/>
          <table:table-cell office:value-type="string" calcext:value-type="string">
            <text:p>Calculation for 1 to 3 Pumps with advanced valve Characterist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ffort</text:p>
          </table:table-cell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bar</text:p>
          </table:table-cell>
          <table:table-cell table:style-name="ce5" table:formula="of:=[.B20]*100000" office:value-type="float" office:value="2000000" calcext:value-type="float">
            <text:p>2.00E+06</text:p>
          </table:table-cell>
          <table:table-cell office:value-type="string" calcext:value-type="string">
            <text:p>P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sistance</text:p>
          </table:table-cell>
          <table:table-cell table:style-name="ce2" office:value-type="float" office:value="2500" calcext:value-type="float">
            <text:p>2500</text:p>
          </table:table-cell>
          <table:table-cell office:value-type="string" calcext:value-type="string">
            <text:p>Pa*s/kg</text:p>
          </table:table-cell>
          <table:table-cell table:number-columns-repeated="4"/>
          <table:table-cell office:value-type="string" calcext:value-type="string">
            <text:p>Resistance</text:p>
          </table:table-cell>
          <table:table-cell office:value-type="string" calcext:value-type="string">
            <text:p>Valve<text:span text:style-name="T1">s</text:span> and</text:p>
          </table:table-cell>
          <table:table-cell table:style-name="ce15" office:value-type="string" calcext:value-type="string" table:number-columns-spanned="3" table:number-rows-spanned="1">
            <text:p>Total Resistance (Valves + Plant) with…</text:p>
          </table:table-cell>
          <table:covered-table-cell table:number-columns-repeated="2"/>
          <table:table-cell table:style-name="ce15" office:value-type="string" calcext:value-type="string" table:number-columns-spanned="3" table:number-rows-spanned="1">
            <text:p>Resulting Flow</text:p>
          </table:table-cell>
          <table:covered-table-cell table:number-columns-repeated="2" table:style-name="ce15"/>
        </table:table-row>
        <table:table-row table:style-name="ro1">
          <table:table-cell table:number-columns-repeated="6"/>
          <table:table-cell office:value-type="string" calcext:value-type="string">
            <text:p>Valve Open</text:p>
          </table:table-cell>
          <table:table-cell office:value-type="string" calcext:value-type="string">
            <text:p>per Valve</text:p>
          </table:table-cell>
          <table:table-cell office:value-type="string" calcext:value-type="string">
            <text:p>Plant Res.</text:p>
          </table:table-cell>
          <table:table-cell office:value-type="string" calcext:value-type="string">
            <text:p>1 Pump</text:p>
          </table:table-cell>
          <table:table-cell office:value-type="string" calcext:value-type="string">
            <text:p>2 Pumps</text:p>
          </table:table-cell>
          <table:table-cell office:value-type="string" calcext:value-type="string">
            <text:p>3 Pumps</text:p>
          </table:table-cell>
          <table:table-cell office:value-type="string" calcext:value-type="string">
            <text:p>1 Pump</text:p>
          </table:table-cell>
          <table:table-cell office:value-type="string" calcext:value-type="string">
            <text:p>2 Pumps</text:p>
          </table:table-cell>
          <table:table-cell office:value-type="string" calcext:value-type="string">
            <text:p>3 Pumps</text:p>
          </table:table-cell>
        </table:table-row>
        <table:table-row table:style-name="ro1">
          <table:table-cell table:style-name="ce1" office:value-type="string" calcext:value-type="string">
            <text:p>Plant parameter</text:p>
          </table:table-cell>
          <table:table-cell table:number-columns-repeated="5"/>
          <table:table-cell office:value-type="float" office:value="0.1" calcext:value-type="float">
            <text:p>0.1</text:p>
          </table:table-cell>
          <table:table-cell table:style-name="ce6" table:formula="of:=[.D$20]/([.B$19]*[.G23]/100)-[.B$21]" office:value-type="float" office:value="3223306.4516129" calcext:value-type="float">
            <text:p>3223306.4516129</text:p>
          </table:table-cell>
          <table:table-cell table:formula="of:=([.H23]/[.B$13])+[.B$25]" office:value-type="float" office:value="1612103.22580645" calcext:value-type="float">
            <text:p>1612103.22580645</text:p>
          </table:table-cell>
          <table:table-cell table:formula="of:=[.$I23]+[.$B$8]" office:value-type="float" office:value="1614103.22580645" calcext:value-type="float">
            <text:p>1614103.22580645</text:p>
          </table:table-cell>
          <table:table-cell table:formula="of:=[.$I23]+[.$B$9]" office:value-type="float" office:value="1613103.22580645" calcext:value-type="float">
            <text:p>1613103.22580645</text:p>
          </table:table-cell>
          <table:table-cell table:formula="of:=[.$I23]+[.$B$10]" office:value-type="float" office:value="1612769.89247312" calcext:value-type="float">
            <text:p>1612769.89247312</text:p>
          </table:table-cell>
          <table:table-cell table:formula="of:=([.$B$6]*[.$D$2]-[.$D$26])/[.J23]" office:value-type="float" office:value="1.27005507902121" calcext:value-type="float">
            <text:p>1.27005507902121</text:p>
          </table:table-cell>
          <table:table-cell table:formula="of:=([.$B$6]*[.$D$2]-[.$D$26])/[.K23]" office:value-type="float" office:value="1.27084241554047" calcext:value-type="float">
            <text:p>1.27084241554047</text:p>
          </table:table-cell>
          <table:table-cell table:formula="of:=([.$B$6]*[.$D$2]-[.$D$26])/[.L23]" office:value-type="float" office:value="1.27110507801978" calcext:value-type="float">
            <text:p>1.27110507801978</text:p>
          </table:table-cell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table:style-name="ce6" table:formula="of:=[.D$20]/([.B$19]*[.G24]/100)-[.B$21]" office:value-type="float" office:value="29758.064516129" calcext:value-type="float">
            <text:p>29758.064516129</text:p>
          </table:table-cell>
          <table:table-cell table:formula="of:=([.H24]/[.B$13])+[.B$25]" office:value-type="float" office:value="15329.0322580645" calcext:value-type="float">
            <text:p>15329.0322580645</text:p>
          </table:table-cell>
          <table:table-cell table:formula="of:=[.$I24]+[.$B$8]" office:value-type="float" office:value="17329.0322580645" calcext:value-type="float">
            <text:p>17329.0322580645</text:p>
          </table:table-cell>
          <table:table-cell table:formula="of:=[.$I24]+[.$B$9]" office:value-type="float" office:value="16329.0322580645" calcext:value-type="float">
            <text:p>16329.0322580645</text:p>
          </table:table-cell>
          <table:table-cell table:formula="of:=[.$I24]+[.$B$10]" office:value-type="float" office:value="15995.6989247312" calcext:value-type="float">
            <text:p>15995.6989247312</text:p>
          </table:table-cell>
          <table:table-cell table:formula="of:=([.$B$6]*[.$D$2]-[.$D$26])/[.J24]" office:value-type="float" office:value="118.298585256888" calcext:value-type="float">
            <text:p>118.298585256888</text:p>
          </table:table-cell>
          <table:table-cell table:formula="of:=([.$B$6]*[.$D$2]-[.$D$26])/[.K24]" office:value-type="float" office:value="125.543263532201" calcext:value-type="float">
            <text:p>125.543263532201</text:p>
          </table:table-cell>
          <table:table-cell table:formula="of:=([.$B$6]*[.$D$2]-[.$D$26])/[.L24]" office:value-type="float" office:value="128.159451465448" calcext:value-type="float">
            <text:p>128.159451465448</text:p>
          </table:table-cell>
        </table:table-row>
        <table:table-row table:style-name="ro1">
          <table:table-cell office:value-type="string" calcext:value-type="string">
            <text:p>resistance (total)</text:p>
          </table:table-cell>
          <table:table-cell table:style-name="ce2" office:value-type="float" office:value="450" calcext:value-type="float">
            <text:p>450</text:p>
          </table:table-cell>
          <table:table-cell office:value-type="string" calcext:value-type="string">
            <text:p>Pa*s/kg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style-name="ce6" table:formula="of:=[.D$20]/([.B$19]*[.G25]/100)-[.B$21]" office:value-type="float" office:value="13629.0322580645" calcext:value-type="float">
            <text:p>13629.0322580645</text:p>
          </table:table-cell>
          <table:table-cell table:formula="of:=([.H25]/[.B$13])+[.B$25]" office:value-type="float" office:value="7264.51612903225" calcext:value-type="float">
            <text:p>7264.51612903225</text:p>
          </table:table-cell>
          <table:table-cell table:formula="of:=[.$I25]+[.$B$8]" office:value-type="float" office:value="9264.51612903225" calcext:value-type="float">
            <text:p>9264.51612903225</text:p>
          </table:table-cell>
          <table:table-cell table:formula="of:=[.$I25]+[.$B$9]" office:value-type="float" office:value="8264.51612903225" calcext:value-type="float">
            <text:p>8264.51612903225</text:p>
          </table:table-cell>
          <table:table-cell table:formula="of:=[.$I25]+[.$B$10]" office:value-type="float" office:value="7931.18279569892" calcext:value-type="float">
            <text:p>7931.18279569892</text:p>
          </table:table-cell>
          <table:table-cell table:formula="of:=([.$B$6]*[.$D$2]-[.$D$26])/[.J25]" office:value-type="float" office:value="221.274373259053" calcext:value-type="float">
            <text:p>221.274373259053</text:p>
          </table:table-cell>
          <table:table-cell table:formula="of:=([.$B$6]*[.$D$2]-[.$D$26])/[.K25]" office:value-type="float" office:value="248.048399687744" calcext:value-type="float">
            <text:p>248.048399687744</text:p>
          </table:table-cell>
          <table:table-cell table:formula="of:=([.$B$6]*[.$D$2]-[.$D$26])/[.L25]" office:value-type="float" office:value="258.473427331887" calcext:value-type="float">
            <text:p>258.473427331887</text:p>
          </table:table-cell>
        </table:table-row>
        <table:table-row table:style-name="ro1">
          <table:table-cell office:value-type="string" calcext:value-type="string">
            <text:p>backPressure</text:p>
          </table:table-cell>
          <table:table-cell table:style-name="ce2" office:value-type="float" office:value="7.5" calcext:value-type="float">
            <text:p>7.5</text:p>
          </table:table-cell>
          <table:table-cell office:value-type="string" calcext:value-type="string">
            <text:p>bar</text:p>
          </table:table-cell>
          <table:table-cell table:style-name="ce5" table:formula="of:=[.B26]*100000" office:value-type="float" office:value="750000" calcext:value-type="float">
            <text:p>7.50E+05</text:p>
          </table:table-cell>
          <table:table-cell office:value-type="string" calcext:value-type="string">
            <text:p>Pa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6" table:formula="of:=[.D$20]/([.B$19]*[.G26]/100)-[.B$21]" office:value-type="float" office:value="8252.68817204301" calcext:value-type="float">
            <text:p>8252.68817204301</text:p>
          </table:table-cell>
          <table:table-cell table:formula="of:=([.H26]/[.B$13])+[.B$25]" office:value-type="float" office:value="4576.34408602151" calcext:value-type="float">
            <text:p>4576.34408602151</text:p>
          </table:table-cell>
          <table:table-cell table:formula="of:=[.$I26]+[.$B$8]" office:value-type="float" office:value="6576.34408602151" calcext:value-type="float">
            <text:p>6576.34408602151</text:p>
          </table:table-cell>
          <table:table-cell table:formula="of:=[.$I26]+[.$B$9]" office:value-type="float" office:value="5576.34408602151" calcext:value-type="float">
            <text:p>5576.34408602151</text:p>
          </table:table-cell>
          <table:table-cell table:formula="of:=[.$I26]+[.$B$10]" office:value-type="float" office:value="5243.01075268817" calcext:value-type="float">
            <text:p>5243.01075268817</text:p>
          </table:table-cell>
          <table:table-cell table:formula="of:=([.$B$6]*[.$D$2]-[.$D$26])/[.J26]" office:value-type="float" office:value="311.723348593852" calcext:value-type="float">
            <text:p>311.723348593852</text:p>
          </table:table-cell>
          <table:table-cell table:formula="of:=([.$B$6]*[.$D$2]-[.$D$26])/[.K26]" office:value-type="float" office:value="367.624373312765" calcext:value-type="float">
            <text:p>367.624373312765</text:p>
          </table:table-cell>
          <table:table-cell table:formula="of:=([.$B$6]*[.$D$2]-[.$D$26])/[.L26]" office:value-type="float" office:value="390.996718621821" calcext:value-type="float">
            <text:p>390.996718621821</text:p>
          </table:table-cell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table:style-name="ce6" table:formula="of:=[.D$20]/([.B$19]*[.G27]/100)-[.B$21]" office:value-type="float" office:value="5564.51612903226" calcext:value-type="float">
            <text:p>5564.51612903226</text:p>
          </table:table-cell>
          <table:table-cell table:formula="of:=([.H27]/[.B$13])+[.B$25]" office:value-type="float" office:value="3232.25806451613" calcext:value-type="float">
            <text:p>3232.25806451613</text:p>
          </table:table-cell>
          <table:table-cell table:formula="of:=[.$I27]+[.$B$8]" office:value-type="float" office:value="5232.25806451613" calcext:value-type="float">
            <text:p>5232.25806451613</text:p>
          </table:table-cell>
          <table:table-cell table:formula="of:=[.$I27]+[.$B$9]" office:value-type="float" office:value="4232.25806451613" calcext:value-type="float">
            <text:p>4232.25806451613</text:p>
          </table:table-cell>
          <table:table-cell table:formula="of:=[.$I27]+[.$B$10]" office:value-type="float" office:value="3898.9247311828" calcext:value-type="float">
            <text:p>3898.9247311828</text:p>
          </table:table-cell>
          <table:table-cell table:formula="of:=([.$B$6]*[.$D$2]-[.$D$26])/[.J27]" office:value-type="float" office:value="391.800246609124" calcext:value-type="float">
            <text:p>391.800246609124</text:p>
          </table:table-cell>
          <table:table-cell table:formula="of:=([.$B$6]*[.$D$2]-[.$D$26])/[.K27]" office:value-type="float" office:value="484.375" calcext:value-type="float">
            <text:p>484.375</text:p>
          </table:table-cell>
          <table:table-cell table:formula="of:=([.$B$6]*[.$D$2]-[.$D$26])/[.L27]" office:value-type="float" office:value="525.785990071704" calcext:value-type="float">
            <text:p>525.785990071704</text:p>
          </table:table-cell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style-name="ce6" table:formula="of:=[.D$20]/([.B$19]*[.G28]/100)-[.B$21]" office:value-type="float" office:value="3951.61290322581" calcext:value-type="float">
            <text:p>3951.61290322581</text:p>
          </table:table-cell>
          <table:table-cell table:formula="of:=([.H28]/[.B$13])+[.B$25]" office:value-type="float" office:value="2425.80645161291" calcext:value-type="float">
            <text:p>2425.80645161291</text:p>
          </table:table-cell>
          <table:table-cell table:formula="of:=[.$I28]+[.$B$8]" office:value-type="float" office:value="4425.80645161291" calcext:value-type="float">
            <text:p>4425.80645161291</text:p>
          </table:table-cell>
          <table:table-cell table:formula="of:=[.$I28]+[.$B$9]" office:value-type="float" office:value="3425.80645161291" calcext:value-type="float">
            <text:p>3425.80645161291</text:p>
          </table:table-cell>
          <table:table-cell table:formula="of:=[.$I28]+[.$B$10]" office:value-type="float" office:value="3092.47311827957" calcext:value-type="float">
            <text:p>3092.47311827957</text:p>
          </table:table-cell>
          <table:table-cell table:formula="of:=([.$B$6]*[.$D$2]-[.$D$26])/[.J28]" office:value-type="float" office:value="463.192419825073" calcext:value-type="float">
            <text:p>463.192419825073</text:p>
          </table:table-cell>
          <table:table-cell table:formula="of:=([.$B$6]*[.$D$2]-[.$D$26])/[.K28]" office:value-type="float" office:value="598.399246704331" calcext:value-type="float">
            <text:p>598.399246704331</text:p>
          </table:table-cell>
          <table:table-cell table:formula="of:=([.$B$6]*[.$D$2]-[.$D$26])/[.L28]" office:value-type="float" office:value="662.899860917941" calcext:value-type="float">
            <text:p>662.899860917941</text:p>
          </table:table-cell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table:style-name="ce6" table:formula="of:=[.D$20]/([.B$19]*[.G29]/100)-[.B$21]" office:value-type="float" office:value="2876.34408602151" calcext:value-type="float">
            <text:p>2876.34408602151</text:p>
          </table:table-cell>
          <table:table-cell table:formula="of:=([.H29]/[.B$13])+[.B$25]" office:value-type="float" office:value="1888.17204301076" calcext:value-type="float">
            <text:p>1888.17204301076</text:p>
          </table:table-cell>
          <table:table-cell table:formula="of:=[.$I29]+[.$B$8]" office:value-type="float" office:value="3888.17204301076" calcext:value-type="float">
            <text:p>3888.17204301076</text:p>
          </table:table-cell>
          <table:table-cell table:formula="of:=[.$I29]+[.$B$9]" office:value-type="float" office:value="2888.17204301076" calcext:value-type="float">
            <text:p>2888.17204301076</text:p>
          </table:table-cell>
          <table:table-cell table:formula="of:=[.$I29]+[.$B$10]" office:value-type="float" office:value="2554.83870967742" calcext:value-type="float">
            <text:p>2554.83870967742</text:p>
          </table:table-cell>
          <table:table-cell table:formula="of:=([.$B$6]*[.$D$2]-[.$D$26])/[.J29]" office:value-type="float" office:value="527.240044247787" calcext:value-type="float">
            <text:p>527.240044247787</text:p>
          </table:table-cell>
          <table:table-cell table:formula="of:=([.$B$6]*[.$D$2]-[.$D$26])/[.K29]" office:value-type="float" office:value="709.791511541325" calcext:value-type="float">
            <text:p>709.791511541325</text:p>
          </table:table-cell>
          <table:table-cell table:formula="of:=([.$B$6]*[.$D$2]-[.$D$26])/[.L29]" office:value-type="float" office:value="802.398989898989" calcext:value-type="float">
            <text:p>802.398989898989</text:p>
          </table:table-cell>
        </table:table-row>
        <table:table-row table:style-name="ro1">
          <table:table-cell table:number-columns-repeated="6"/>
          <table:table-cell office:value-type="float" office:value="70" calcext:value-type="float">
            <text:p>70</text:p>
          </table:table-cell>
          <table:table-cell table:style-name="ce6" table:formula="of:=[.D$20]/([.B$19]*[.G30]/100)-[.B$21]" office:value-type="float" office:value="2108.29493087558" calcext:value-type="float">
            <text:p>2108.29493087558</text:p>
          </table:table-cell>
          <table:table-cell table:formula="of:=([.H30]/[.B$13])+[.B$25]" office:value-type="float" office:value="1504.14746543779" calcext:value-type="float">
            <text:p>1504.14746543779</text:p>
          </table:table-cell>
          <table:table-cell table:formula="of:=[.$I30]+[.$B$8]" office:value-type="float" office:value="3504.14746543779" calcext:value-type="float">
            <text:p>3504.14746543779</text:p>
          </table:table-cell>
          <table:table-cell table:formula="of:=[.$I30]+[.$B$9]" office:value-type="float" office:value="2504.14746543779" calcext:value-type="float">
            <text:p>2504.14746543779</text:p>
          </table:table-cell>
          <table:table-cell table:formula="of:=[.$I30]+[.$B$10]" office:value-type="float" office:value="2170.81413210446" calcext:value-type="float">
            <text:p>2170.81413210446</text:p>
          </table:table-cell>
          <table:table-cell table:formula="of:=([.$B$6]*[.$D$2]-[.$D$26])/[.J30]" office:value-type="float" office:value="585.021041557075" calcext:value-type="float">
            <text:p>585.021041557075</text:p>
          </table:table-cell>
          <table:table-cell table:formula="of:=([.$B$6]*[.$D$2]-[.$D$26])/[.K30]" office:value-type="float" office:value="818.641884431358" calcext:value-type="float">
            <text:p>818.641884431358</text:p>
          </table:table-cell>
          <table:table-cell table:formula="of:=([.$B$6]*[.$D$2]-[.$D$26])/[.L30]" office:value-type="float" office:value="944.346164732521" calcext:value-type="float">
            <text:p>944.346164732521</text:p>
          </table:table-cell>
        </table:table-row>
        <table:table-row table:style-name="ro1">
          <table:table-cell table:number-columns-repeated="6"/>
          <table:table-cell office:value-type="float" office:value="80" calcext:value-type="float">
            <text:p>80</text:p>
          </table:table-cell>
          <table:table-cell table:style-name="ce6" table:formula="of:=[.D$20]/([.B$19]*[.G31]/100)-[.B$21]" office:value-type="float" office:value="1532.25806451613" calcext:value-type="float">
            <text:p>1532.25806451613</text:p>
          </table:table-cell>
          <table:table-cell table:formula="of:=([.H31]/[.B$13])+[.B$25]" office:value-type="float" office:value="1216.12903225806" calcext:value-type="float">
            <text:p>1216.12903225806</text:p>
          </table:table-cell>
          <table:table-cell table:formula="of:=[.$I31]+[.$B$8]" office:value-type="float" office:value="3216.12903225807" calcext:value-type="float">
            <text:p>3216.12903225807</text:p>
          </table:table-cell>
          <table:table-cell table:formula="of:=[.$I31]+[.$B$9]" office:value-type="float" office:value="2216.12903225807" calcext:value-type="float">
            <text:p>2216.12903225807</text:p>
          </table:table-cell>
          <table:table-cell table:formula="of:=[.$I31]+[.$B$10]" office:value-type="float" office:value="1882.79569892473" calcext:value-type="float">
            <text:p>1882.79569892473</text:p>
          </table:table-cell>
          <table:table-cell table:formula="of:=([.$B$6]*[.$D$2]-[.$D$26])/[.J31]" office:value-type="float" office:value="637.41223671013" calcext:value-type="float">
            <text:p>637.41223671013</text:p>
          </table:table-cell>
          <table:table-cell table:formula="of:=([.$B$6]*[.$D$2]-[.$D$26])/[.K31]" office:value-type="float" office:value="925.036390101892" calcext:value-type="float">
            <text:p>925.036390101892</text:p>
          </table:table-cell>
          <table:table-cell table:formula="of:=([.$B$6]*[.$D$2]-[.$D$26])/[.L31]" office:value-type="float" office:value="1088.80639634495" calcext:value-type="float">
            <text:p>1088.80639634495</text:p>
          </table:table-cell>
        </table:table-row>
        <table:table-row table:style-name="ro1">
          <table:table-cell table:number-columns-repeated="6"/>
          <table:table-cell office:value-type="float" office:value="90" calcext:value-type="float">
            <text:p>90</text:p>
          </table:table-cell>
          <table:table-cell table:style-name="ce6" table:formula="of:=[.D$20]/([.B$19]*[.G32]/100)-[.B$21]" office:value-type="float" office:value="1084.229390681" calcext:value-type="float">
            <text:p>1084.229390681</text:p>
          </table:table-cell>
          <table:table-cell table:formula="of:=([.H32]/[.B$13])+[.B$25]" office:value-type="float" office:value="992.1146953405" calcext:value-type="float">
            <text:p>992.1146953405</text:p>
          </table:table-cell>
          <table:table-cell table:formula="of:=[.$I32]+[.$B$8]" office:value-type="float" office:value="2992.1146953405" calcext:value-type="float">
            <text:p>2992.1146953405</text:p>
          </table:table-cell>
          <table:table-cell table:formula="of:=[.$I32]+[.$B$9]" office:value-type="float" office:value="1992.1146953405" calcext:value-type="float">
            <text:p>1992.1146953405</text:p>
          </table:table-cell>
          <table:table-cell table:formula="of:=[.$I32]+[.$B$10]" office:value-type="float" office:value="1658.78136200717" calcext:value-type="float">
            <text:p>1658.78136200717</text:p>
          </table:table-cell>
          <table:table-cell table:formula="of:=([.$B$6]*[.$D$2]-[.$D$26])/[.J32]" office:value-type="float" office:value="685.134163871587" calcext:value-type="float">
            <text:p>685.134163871587</text:p>
          </table:table-cell>
          <table:table-cell table:formula="of:=([.$B$6]*[.$D$2]-[.$D$26])/[.K32]" office:value-type="float" office:value="1029.05721482548" calcext:value-type="float">
            <text:p>1029.05721482548</text:p>
          </table:table-cell>
          <table:table-cell table:formula="of:=([.$B$6]*[.$D$2]-[.$D$26])/[.L32]" office:value-type="float" office:value="1235.84701815039" calcext:value-type="float">
            <text:p>1235.84701815039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style-name="ce6" table:formula="of:=[.D$20]/([.B$19]*[.G33]/100)-[.B$21]" office:value-type="float" office:value="725.806451612903" calcext:value-type="float">
            <text:p>725.806451612903</text:p>
          </table:table-cell>
          <table:table-cell table:formula="of:=([.H33]/[.B$13])+[.B$25]" office:value-type="float" office:value="812.903225806452" calcext:value-type="float">
            <text:p>812.903225806452</text:p>
          </table:table-cell>
          <table:table-cell table:formula="of:=[.$I33]+[.$B$8]" office:value-type="float" office:value="2812.90322580645" calcext:value-type="float">
            <text:p>2812.90322580645</text:p>
          </table:table-cell>
          <table:table-cell table:formula="of:=[.$I33]+[.$B$9]" office:value-type="float" office:value="1812.90322580645" calcext:value-type="float">
            <text:p>1812.90322580645</text:p>
          </table:table-cell>
          <table:table-cell table:formula="of:=[.$I33]+[.$B$10]" office:value-type="float" office:value="1479.56989247312" calcext:value-type="float">
            <text:p>1479.56989247312</text:p>
          </table:table-cell>
          <table:table-cell table:formula="of:=([.$B$6]*[.$D$2]-[.$D$26])/[.J33]" office:value-type="float" office:value="728.784403669725" calcext:value-type="float">
            <text:p>728.784403669725</text:p>
          </table:table-cell>
          <table:table-cell table:formula="of:=([.$B$6]*[.$D$2]-[.$D$26])/[.K33]" office:value-type="float" office:value="1130.78291814947" calcext:value-type="float">
            <text:p>1130.78291814947</text:p>
          </table:table-cell>
          <table:table-cell table:formula="of:=([.$B$6]*[.$D$2]-[.$D$26])/[.L33]" office:value-type="float" office:value="1385.53779069767" calcext:value-type="float">
            <text:p>1385.53779069767</text:p>
          </table:table-cell>
        </table:table-row>
        <calcext:conditional-formats>
          <calcext:conditional-format calcext:target-range-address="Condensation.H23:Condensation.H33">
            <calcext:condition calcext:apply-style-name="Bad" calcext:value="&lt;0" calcext:base-cell-address="Condensation.H23"/>
          </calcext:conditional-format>
        </calcext:conditional-formats>
      </table:table>
      <table:table table:name="Feedwater Main" table:style-name="ta1">
        <table:shapes>
          <draw:frame draw:z-index="0" draw:style-name="gr1" draw:text-style-name="P1" svg:width="5.3079in" svg:height="4.9776in" svg:x="4.05in" svg:y="0.2945in">
            <draw:object draw:notify-on-update-of-ranges="'Feedwater Main'.G7:'Feedwater Main'.G17 'Feedwater Main'.K6:'Feedwater Main'.K6 'Feedwater Main'.K7:'Feedwater Main'.K1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number-columns-repeated="6" table:default-cell-style-name="Default"/>
        <table:table-row table:style-name="ro1">
          <table:table-cell table:style-name="ce1" office:value-type="string" calcext:value-type="string">
            <text:p>Pump Paramete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Head</text:p>
          </table:table-cell>
          <table:table-cell table:style-name="ce2" office:value-type="float" office:value="95" calcext:value-type="float">
            <text:p>95</text:p>
          </table:table-cell>
          <table:table-cell office:value-type="string" calcext:value-type="string">
            <text:p>bar</text:p>
          </table:table-cell>
          <table:table-cell table:style-name="ce4" table:formula="of:=[.B2]*100000" office:value-type="float" office:value="9500000" calcext:value-type="float">
            <text:p>9.50E+06</text:p>
          </table:table-cell>
          <table:table-cell office:value-type="string" calcext:value-type="string">
            <text:p>P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rkingPressure</text:p>
          </table:table-cell>
          <table:table-cell table:style-name="ce2" office:value-type="float" office:value="65" calcext:value-type="float">
            <text:p>65</text:p>
          </table:table-cell>
          <table:table-cell office:value-type="string" calcext:value-type="string">
            <text:p>bar</text:p>
          </table:table-cell>
          <table:table-cell table:style-name="ce4" table:formula="of:=[.B3]*100000" office:value-type="float" office:value="6500000" calcext:value-type="float">
            <text:p>6.50E+06</text:p>
          </table:table-cell>
          <table:table-cell office:value-type="string" calcext:value-type="string">
            <text:p>Pa</text:p>
          </table:table-cell>
          <table:table-cell table:number-columns-repeated="6"/>
          <table:table-cell table:style-name="ce13"/>
        </table:table-row>
        <table:table-row table:style-name="ro1">
          <table:table-cell office:value-type="string" calcext:value-type="string">
            <text:p>workingFlow</text:p>
          </table:table-cell>
          <table:table-cell table:style-name="ce2" office:value-type="float" office:value="388" calcext:value-type="float">
            <text:p>388</text:p>
          </table:table-cell>
          <table:table-cell office:value-type="string" calcext:value-type="string">
            <text:p>kg/s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Resistance</text:p>
          </table:table-cell>
          <table:table-cell office:value-type="string" calcext:value-type="string">
            <text:p>Valve and</text:p>
          </table:table-cell>
          <table:table-cell table:style-name="ce13" office:value-type="string" calcext:value-type="string">
            <text:p>Total R</text:p>
          </table:table-cell>
          <table:table-cell table:style-name="ce13"/>
          <table:table-cell/>
        </table:table-row>
        <table:table-row table:style-name="ro1">
          <table:table-cell/>
          <table:table-cell table:style-name="ce2"/>
          <table:table-cell table:number-columns-repeated="4"/>
          <table:table-cell office:value-type="string" calcext:value-type="string">
            <text:p>Valve Open</text:p>
          </table:table-cell>
          <table:table-cell office:value-type="string" calcext:value-type="string">
            <text:p>per Valve</text:p>
          </table:table-cell>
          <table:table-cell office:value-type="string" calcext:value-type="string">
            <text:p>Plant Res.</text:p>
          </table:table-cell>
          <table:table-cell office:value-type="string" calcext:value-type="string">
            <text:p>inc. Pump</text:p>
          </table:table-cell>
          <table:table-cell office:value-type="string" calcext:value-type="string">
            <text:p>Flow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1" calcext:value-type="float">
            <text:p>0.1</text:p>
          </table:table-cell>
          <table:table-cell table:style-name="ce20" table:formula="of:=[.D$15]/([.B$14]*[.G7]/100)-[.B$16]" office:value-type="float" office:value="3746900" calcext:value-type="float">
            <text:p>3746900</text:p>
          </table:table-cell>
          <table:table-cell table:formula="of:=([.H7])+[.B$20]" office:value-type="float" office:value="3747400" calcext:value-type="float">
            <text:p>3747400</text:p>
          </table:table-cell>
          <table:table-cell table:formula="of:=[.$I7]+[.$B$8]" office:value-type="float" office:value="3755131.95876289" calcext:value-type="float">
            <text:p>3755131.95876289</text:p>
          </table:table-cell>
          <table:table-cell table:formula="of:=([.$D$2]-[.$D$21])/[.J7]" office:value-type="float" office:value="0.998633347957078" calcext:value-type="float">
            <text:p>0.998633347957078</text:p>
          </table:table-cell>
          <table:table-cell/>
        </table:table-row>
        <table:table-row table:style-name="ro1">
          <table:table-cell office:value-type="string" calcext:value-type="string">
            <text:p>flowResistance</text:p>
          </table:table-cell>
          <table:table-cell table:formula="of:=([.D2]-[.D3])/[.B4]" office:value-type="float" office:value="7731.9587628866" calcext:value-type="float">
            <text:p>7731.9587628866</text:p>
          </table:table-cell>
          <table:table-cell office:value-type="string" calcext:value-type="string">
            <text:p>Pa*s/kg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20" table:formula="of:=[.D$15]/([.B$14]*[.G8]/100)-[.B$16]" office:value-type="float" office:value="34400" calcext:value-type="float">
            <text:p>34400</text:p>
          </table:table-cell>
          <table:table-cell table:formula="of:=([.H8])+[.B$20]" office:value-type="float" office:value="34900" calcext:value-type="float">
            <text:p>34900</text:p>
          </table:table-cell>
          <table:table-cell table:formula="of:=[.$I8]+[.$B$8]" office:value-type="float" office:value="42631.9587628866" calcext:value-type="float">
            <text:p>42631.9587628866</text:p>
          </table:table-cell>
          <table:table-cell table:formula="of:=([.$D$2]-[.$D$21])/[.J8]" office:value-type="float" office:value="87.9621792856625" calcext:value-type="float">
            <text:p>87.962179285662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table:style-name="ce20" table:formula="of:=[.D$15]/([.B$14]*[.G9]/100)-[.B$16]" office:value-type="float" office:value="15650" calcext:value-type="float">
            <text:p>15650</text:p>
          </table:table-cell>
          <table:table-cell table:formula="of:=([.H9])+[.B$20]" office:value-type="float" office:value="16150" calcext:value-type="float">
            <text:p>16150</text:p>
          </table:table-cell>
          <table:table-cell table:formula="of:=[.$I9]+[.$B$8]" office:value-type="float" office:value="23881.9587628866" calcext:value-type="float">
            <text:p>23881.9587628866</text:p>
          </table:table-cell>
          <table:table-cell table:formula="of:=([.$D$2]-[.$D$21])/[.J9]" office:value-type="float" office:value="157.022296086853" calcext:value-type="float">
            <text:p>157.022296086853</text:p>
          </table:table-cell>
          <table:table-cell/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table:style-name="ce20" table:formula="of:=[.D$15]/([.B$14]*[.G10]/100)-[.B$16]" office:value-type="float" office:value="9400" calcext:value-type="float">
            <text:p>9400</text:p>
          </table:table-cell>
          <table:table-cell table:formula="of:=([.H10])+[.B$20]" office:value-type="float" office:value="9900" calcext:value-type="float">
            <text:p>9900</text:p>
          </table:table-cell>
          <table:table-cell table:formula="of:=[.$I10]+[.$B$8]" office:value-type="float" office:value="17631.9587628866" calcext:value-type="float">
            <text:p>17631.9587628866</text:p>
          </table:table-cell>
          <table:table-cell table:formula="of:=([.$D$2]-[.$D$21])/[.J10]" office:value-type="float" office:value="212.681985616558" calcext:value-type="float">
            <text:p>212.681985616558</text:p>
          </table:table-cell>
          <table:table-cell/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table:style-name="ce20" table:formula="of:=[.D$15]/([.B$14]*[.G11]/100)-[.B$16]" office:value-type="float" office:value="6275" calcext:value-type="float">
            <text:p>6275</text:p>
          </table:table-cell>
          <table:table-cell table:formula="of:=([.H11])+[.B$20]" office:value-type="float" office:value="6775" calcext:value-type="float">
            <text:p>6775</text:p>
          </table:table-cell>
          <table:table-cell table:formula="of:=[.$I11]+[.$B$8]" office:value-type="float" office:value="14506.9587628866" calcext:value-type="float">
            <text:p>14506.9587628866</text:p>
          </table:table-cell>
          <table:table-cell table:formula="of:=([.$D$2]-[.$D$21])/[.J11]" office:value-type="float" office:value="258.496633325635" calcext:value-type="float">
            <text:p>258.496633325635</text:p>
          </table:table-cell>
          <table:table-cell/>
        </table:table-row>
        <table:table-row table:style-name="ro1">
          <table:table-cell table:style-name="ce1" office:value-type="string" calcext:value-type="string">
            <text:p>Valve Parameters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style-name="ce20" table:formula="of:=[.D$15]/([.B$14]*[.G12]/100)-[.B$16]" office:value-type="float" office:value="4400" calcext:value-type="float">
            <text:p>4400</text:p>
          </table:table-cell>
          <table:table-cell table:formula="of:=([.H12])+[.B$20]" office:value-type="float" office:value="4900" calcext:value-type="float">
            <text:p>4900</text:p>
          </table:table-cell>
          <table:table-cell table:formula="of:=[.$I12]+[.$B$8]" office:value-type="float" office:value="12631.9587628866" calcext:value-type="float">
            <text:p>12631.9587628866</text:p>
          </table:table-cell>
          <table:table-cell table:formula="of:=([.$D$2]-[.$D$21])/[.J12]" office:value-type="float" office:value="296.866073614625" calcext:value-type="float">
            <text:p>296.866073614625</text:p>
          </table:table-cell>
          <table:table-cell/>
        </table:table-row>
        <table:table-row table:style-name="ro1">
          <table:table-cell office:value-type="string" calcext:value-type="string">
            <text:p>Advanced Characteristic: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table:style-name="ce20" table:formula="of:=[.D$15]/([.B$14]*[.G13]/100)-[.B$16]" office:value-type="float" office:value="3150" calcext:value-type="float">
            <text:p>3150</text:p>
          </table:table-cell>
          <table:table-cell table:formula="of:=([.H13])+[.B$20]" office:value-type="float" office:value="3650" calcext:value-type="float">
            <text:p>3650</text:p>
          </table:table-cell>
          <table:table-cell table:formula="of:=[.$I13]+[.$B$8]" office:value-type="float" office:value="11381.9587628866" calcext:value-type="float">
            <text:p>11381.9587628866</text:p>
          </table:table-cell>
          <table:table-cell table:formula="of:=([.$D$2]-[.$D$21])/[.J13]" office:value-type="float" office:value="329.468774059146" calcext:value-type="float">
            <text:p>329.468774059146</text:p>
          </table:table-cell>
          <table:table-cell/>
        </table:table-row>
        <table:table-row table:style-name="ro1">
          <table:table-cell office:value-type="string" calcext:value-type="string">
            <text:p>flowOpen</text:p>
          </table:table-cell>
          <table:table-cell table:style-name="ce2" office:value-type="float" office:value="1200" calcext:value-type="float">
            <text:p>1200</text:p>
          </table:table-cell>
          <table:table-cell office:value-type="string" calcext:value-type="string">
            <text:p>kg/s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style-name="ce20" table:formula="of:=[.D$15]/([.B$14]*[.G14]/100)-[.B$16]" office:value-type="float" office:value="2257.14285714286" calcext:value-type="float">
            <text:p>2257.14285714286</text:p>
          </table:table-cell>
          <table:table-cell table:formula="of:=([.H14])+[.B$20]" office:value-type="float" office:value="2757.14285714286" calcext:value-type="float">
            <text:p>2757.14285714286</text:p>
          </table:table-cell>
          <table:table-cell table:formula="of:=[.$I14]+[.$B$8]" office:value-type="float" office:value="10489.1016200295" calcext:value-type="float">
            <text:p>10489.1016200295</text:p>
          </table:table-cell>
          <table:table-cell table:formula="of:=([.$D$2]-[.$D$21])/[.J14]" office:value-type="float" office:value="357.513935496553" calcext:value-type="float">
            <text:p>357.513935496553</text:p>
          </table:table-cell>
          <table:table-cell/>
        </table:table-row>
        <table:table-row table:style-name="ro1">
          <table:table-cell office:value-type="string" calcext:value-type="string">
            <text:p>effort</text:p>
          </table:table-cell>
          <table:table-cell table:style-name="ce3" office:value-type="float" office:value="45" calcext:value-type="float">
            <text:p>45</text:p>
          </table:table-cell>
          <table:table-cell office:value-type="string" calcext:value-type="string">
            <text:p>bar</text:p>
          </table:table-cell>
          <table:table-cell table:style-name="ce5" table:formula="of:=[.B15]*100000" office:value-type="float" office:value="4500000" calcext:value-type="float">
            <text:p>4.50E+06</text:p>
          </table:table-cell>
          <table:table-cell office:value-type="string" calcext:value-type="string">
            <text:p>Pa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20" table:formula="of:=[.D$15]/([.B$14]*[.G15]/100)-[.B$16]" office:value-type="float" office:value="1587.5" calcext:value-type="float">
            <text:p>1587.5</text:p>
          </table:table-cell>
          <table:table-cell table:formula="of:=([.H15])+[.B$20]" office:value-type="float" office:value="2087.5" calcext:value-type="float">
            <text:p>2087.5</text:p>
          </table:table-cell>
          <table:table-cell table:formula="of:=[.$I15]+[.$B$8]" office:value-type="float" office:value="9819.4587628866" calcext:value-type="float">
            <text:p>9819.4587628866</text:p>
          </table:table-cell>
          <table:table-cell table:formula="of:=([.$D$2]-[.$D$21])/[.J15]" office:value-type="float" office:value="381.894775521988" calcext:value-type="float">
            <text:p>381.894775521988</text:p>
          </table:table-cell>
          <table:table-cell/>
        </table:table-row>
        <table:table-row table:style-name="ro1">
          <table:table-cell office:value-type="string" calcext:value-type="string">
            <text:p>resistance</text:p>
          </table:table-cell>
          <table:table-cell table:style-name="ce2" office:value-type="float" office:value="3100" calcext:value-type="float">
            <text:p>3100</text:p>
          </table:table-cell>
          <table:table-cell office:value-type="string" calcext:value-type="string">
            <text:p>Pa*s/kg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table:style-name="ce20" table:formula="of:=[.D$15]/([.B$14]*[.G16]/100)-[.B$16]" office:value-type="float" office:value="1066.66666666667" calcext:value-type="float">
            <text:p>1066.66666666667</text:p>
          </table:table-cell>
          <table:table-cell table:formula="of:=([.H16])+[.B$20]" office:value-type="float" office:value="1566.66666666667" calcext:value-type="float">
            <text:p>1566.66666666667</text:p>
          </table:table-cell>
          <table:table-cell table:formula="of:=[.$I16]+[.$B$8]" office:value-type="float" office:value="9298.62542955327" calcext:value-type="float">
            <text:p>9298.62542955327</text:p>
          </table:table-cell>
          <table:table-cell table:formula="of:=([.$D$2]-[.$D$21])/[.J16]" office:value-type="float" office:value="403.285413356" calcext:value-type="float">
            <text:p>403.28541335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style-name="ce20" table:formula="of:=[.D$15]/([.B$14]*[.G17]/100)-[.B$16]" office:value-type="float" office:value="650" calcext:value-type="float">
            <text:p>650</text:p>
          </table:table-cell>
          <table:table-cell table:formula="of:=([.H17])+[.B$20]" office:value-type="float" office:value="1150" calcext:value-type="float">
            <text:p>1150</text:p>
          </table:table-cell>
          <table:table-cell table:formula="of:=[.$I17]+[.$B$8]" office:value-type="float" office:value="8881.9587628866" calcext:value-type="float">
            <text:p>8881.9587628866</text:p>
          </table:table-cell>
          <table:table-cell table:formula="of:=([.$D$2]-[.$D$21])/[.J17]" office:value-type="float" office:value="422.204166908479" calcext:value-type="float">
            <text:p>422.204166908479</text:p>
          </table:table-cell>
          <table:table-cell/>
        </table:table-row>
        <table:table-row table:style-name="ro1">
          <table:table-cell table:style-name="ce1" office:value-type="string" calcext:value-type="string">
            <text:p>Plant parameter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esistance (total)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Pa*s/k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ckPressure</text:p>
          </table:table-cell>
          <table:table-cell table:style-name="ce2" table:formula="of:=65-7.5" office:value-type="float" office:value="57.5" calcext:value-type="float">
            <text:p>57.5</text:p>
          </table:table-cell>
          <table:table-cell office:value-type="string" calcext:value-type="string">
            <text:p>bar</text:p>
          </table:table-cell>
          <table:table-cell table:style-name="ce5" table:formula="of:=[.B21]*100000" office:value-type="float" office:value="5750000" calcext:value-type="float">
            <text:p>5.75E+06</text:p>
          </table:table-cell>
          <table:table-cell office:value-type="string" calcext:value-type="string">
            <text:p>Pa</text:p>
          </table:table-cell>
          <table:table-cell table:number-columns-repeated="6"/>
          <table:table-cell table:style-name="ce1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4" office:value-type="string" calcext:value-type="string" table:number-columns-spanned="4" table:number-rows-spanned="9">
            <text:p>There are 2 pumps on each side with each having</text:p>
            <text:p>one full load valve, on full load, flow will be 388.8</text:p>
            <text:p>kg/s, pressure in DA is 7.4 bar and 65 bar in drums.</text:p>
            <text:p/>
            <text:p>This gives a pressure diff of 57.6 bar.</text:p>
            <text:p/>
            <text:p>The calculation done for one valve with one pump</text:p>
            <text:p>only. The second one in this chart just shows what </text:p>
            <text:p>would happen if you only open one valve.</text:p>
          </table:table-cell>
          <table:covered-table-cell table:number-columns-repeated="3"/>
          <table:table-cell table:number-columns-repeated="8"/>
        </table:table-row>
        <table:table-row table:style-name="ro1">
          <table:covered-table-cell table:number-columns-repeated="4"/>
          <table:table-cell table:number-columns-repeated="8"/>
        </table:table-row>
        <table:table-row table:style-name="ro1">
          <table:covered-table-cell table:number-columns-repeated="4"/>
          <table:table-cell table:number-columns-repeated="8"/>
        </table:table-row>
        <table:table-row table:style-name="ro1">
          <table:covered-table-cell table:number-columns-repeated="4"/>
          <table:table-cell table:number-columns-repeated="8"/>
        </table:table-row>
        <table:table-row table:style-name="ro1">
          <table:covered-table-cell table:number-columns-repeated="4"/>
          <table:table-cell table:number-columns-repeated="8"/>
        </table:table-row>
        <table:table-row table:style-name="ro1">
          <table:covered-table-cell table:number-columns-repeated="4"/>
          <table:table-cell table:number-columns-repeated="8"/>
        </table:table-row>
        <table:table-row table:style-name="ro1">
          <table:covered-table-cell table:number-columns-repeated="4"/>
          <table:table-cell table:number-columns-repeated="8"/>
        </table:table-row>
        <table:table-row table:style-name="ro1">
          <table:covered-table-cell table:number-columns-repeated="4"/>
          <table:table-cell table:number-columns-repeated="8"/>
        </table:table-row>
        <table:table-row table:style-name="ro1">
          <table:covered-table-cell table:number-columns-repeated="4"/>
          <table:table-cell table:number-columns-repeated="8"/>
        </table:table-row>
        <calcext:conditional-formats>
          <calcext:conditional-format calcext:target-range-address="'Feedwater Main'.H7:'Feedwater Main'.H17">
            <calcext:condition calcext:apply-style-name="Bad" calcext:value="&lt;0" calcext:base-cell-address="'Feedwater Main'.H7"/>
          </calcext:conditional-format>
        </calcext:conditional-formats>
      </table:table>
      <table:table table:name="Feedwater Startup" table:style-name="ta1">
        <table:shapes>
          <draw:frame draw:z-index="0" draw:style-name="gr1" draw:text-style-name="P1" svg:width="6.7476in" svg:height="5.1417in" svg:x="4.374in" svg:y="1.4232in">
            <draw:object draw:notify-on-update-of-ranges="'Feedwater Startup'.G19:'Feedwater Startup'.G29 'Feedwater Startup'.I19:'Feedwater Startup'.I29 'Feedwater Startup'.G19:'Feedwater Startup'.G29 'Feedwater Startup'.J19:'Feedwater Startup'.J29 'Feedwater Startup'.G19:'Feedwater Startup'.G29 'Feedwater Startup'.K19:'Feedwater Startup'.K29 'Feedwater Startup'.G19:'Feedwater Startup'.G29 'Feedwater Startup'.L19:'Feedwater Startup'.L29 'Feedwater Startup'.G19:'Feedwater Startup'.G29 'Feedwater Startup'.M19:'Feedwater Startup'.M2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ce28"/>
        <table:table-column table:style-name="co7" table:number-columns-repeated="4" table:default-cell-style-name="ce28"/>
        <table:table-row table:style-name="ro1">
          <table:table-cell table:style-name="ce1" office:value-type="string" calcext:value-type="string">
            <text:p>Pump Parameters</text:p>
          </table:table-cell>
          <table:table-cell table:number-columns-repeated="7"/>
          <table:table-cell table:style-name="Default" table:number-columns-repeated="5"/>
        </table:table-row>
        <table:table-row table:style-name="ro1">
          <table:table-cell office:value-type="string" calcext:value-type="string">
            <text:p>totalHead</text:p>
          </table:table-cell>
          <table:table-cell table:style-name="ce16" table:formula="of:=[$'Feedwater Main'.B2]" office:value-type="float" office:value="95" calcext:value-type="float">
            <text:p>95</text:p>
          </table:table-cell>
          <table:table-cell office:value-type="string" calcext:value-type="string">
            <text:p>bar</text:p>
          </table:table-cell>
          <table:table-cell table:style-name="ce4" table:formula="of:=[.B2]*100000" office:value-type="float" office:value="9500000" calcext:value-type="float">
            <text:p>9.50E+06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This chart shows 5 individual cases that are defined as a pair of total backpressure (this is the</text:p>
          </table:table-cell>
          <table:table-cell/>
          <table:table-cell office:value-type="string" calcext:value-type="string">
            <text:p>Resistance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workingPressure</text:p>
          </table:table-cell>
          <table:table-cell table:style-name="ce16" table:formula="of:=[$'Feedwater Main'.B3]" office:value-type="float" office:value="65" calcext:value-type="float">
            <text:p>65</text:p>
          </table:table-cell>
          <table:table-cell office:value-type="string" calcext:value-type="string">
            <text:p>bar</text:p>
          </table:table-cell>
          <table:table-cell table:style-name="ce4" table:formula="of:=[.B3]*100000" office:value-type="float" office:value="6500000" calcext:value-type="float">
            <text:p>6.50E+06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ressure inside the steam drum) and position of the startup reduction valve.</text:p>
          </table:table-cell>
          <table:table-cell/>
          <table:table-cell office:value-type="string" calcext:value-type="string">
            <text:p>RegValve, Pump</text:p>
          </table:table-cell>
          <table:table-cell table:style-name="Default" office:value-type="string" calcext:value-type="string" table:number-columns-spanned="5" table:number-rows-spanned="1">
            <text:p>Adding each Reduction Valve Position for each of the 5 cases</text:p>
          </table:table-cell>
          <table:covered-table-cell table:style-name="ce15"/>
          <table:covered-table-cell table:number-columns-repeated="3" table:style-name="Default"/>
        </table:table-row>
        <table:table-row table:style-name="ro1">
          <table:table-cell office:value-type="string" calcext:value-type="string">
            <text:p>workingFlow</text:p>
          </table:table-cell>
          <table:table-cell table:style-name="ce16" table:formula="of:=[$'Feedwater Main'.B4]" office:value-type="float" office:value="388" calcext:value-type="float">
            <text:p>388</text:p>
          </table:table-cell>
          <table:table-cell office:value-type="string" calcext:value-type="string">
            <text:p>kg/s</text:p>
          </table:table-cell>
          <table:table-cell table:number-columns-repeated="2"/>
          <table:table-cell office:value-type="string" calcext:value-type="string">
            <text:p>The valves are tuned by trying to get the proper flows for all different operating regimes during</text:p>
          </table:table-cell>
          <table:table-cell office:value-type="string" calcext:value-type="string">
            <text:p>Valve Open</text:p>
          </table:table-cell>
          <table:table-cell office:value-type="string" calcext:value-type="string">
            <text:p>and Shutoff Valv</text:p>
          </table:table-cell>
          <table:table-cell table:style-name="Default" office:value-type="string" calcext:value-type="string">
            <text:p>case 1</text:p>
          </table:table-cell>
          <table:table-cell table:style-name="ce30" office:value-type="string" calcext:value-type="string">
            <text:p>case 2</text:p>
          </table:table-cell>
          <table:table-cell table:style-name="Default" office:value-type="string" calcext:value-type="string">
            <text:p>case 3</text:p>
          </table:table-cell>
          <table:table-cell table:style-name="Default" office:value-type="string" calcext:value-type="string">
            <text:p>case 4</text:p>
          </table:table-cell>
          <table:table-cell table:style-name="Default" office:value-type="string" calcext:value-type="string">
            <text:p>case 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tartup. With low pressure, flow has to be limited by the reduction valves.</text:p>
          </table:table-cell>
          <table:table-cell office:value-type="float" office:value="0.1" calcext:value-type="float">
            <text:p>0.1</text:p>
          </table:table-cell>
          <table:table-cell table:style-name="ce27" table:formula="of:=[.D$11]/([.B$10]*[.G5]/100)-[.B$12]+[.B$6]+[.B$22]" office:value-type="float" office:value="8139766.84248382" calcext:value-type="float">
            <text:p>8139767</text:p>
          </table:table-cell>
          <table:table-cell table:formula="of:=[.$H5]+[.$D$32]" office:value-type="float" office:value="8166433.50915049" calcext:value-type="float">
            <text:p>8166434</text:p>
          </table:table-cell>
          <table:table-cell table:formula="of:=[.$H5]+[.$D$33]" office:value-type="float" office:value="8155766.84248382" calcext:value-type="float">
            <text:p>8155767</text:p>
          </table:table-cell>
          <table:table-cell table:formula="of:=[.$H5]+[.$D$34]" office:value-type="float" office:value="8153100.17581715" calcext:value-type="float">
            <text:p>8153100</text:p>
          </table:table-cell>
          <table:table-cell table:formula="of:=[.$H5]+[.$D$35]" office:value-type="float" office:value="8149766.84248382" calcext:value-type="float">
            <text:p>8149767</text:p>
          </table:table-cell>
          <table:table-cell table:formula="of:=[.$H5]+[.$D$36]" office:value-type="float" office:value="8143766.84248382" calcext:value-type="float">
            <text:p>8143767</text:p>
          </table:table-cell>
        </table:table-row>
        <table:table-row table:style-name="ro1">
          <table:table-cell office:value-type="string" calcext:value-type="string">
            <text:p>flowResistance</text:p>
          </table:table-cell>
          <table:table-cell table:formula="of:=([.D2]-[.D3])/[.B4]" office:value-type="float" office:value="7731.9587628866" calcext:value-type="float">
            <text:p>7731.9587628866</text:p>
          </table:table-cell>
          <table:table-cell office:value-type="string" calcext:value-type="string">
            <text:p>Pa*s/kg</text:p>
          </table:table-cell>
          <table:table-cell table:number-columns-repeated="2"/>
          <table:table-cell office:value-type="string" calcext:value-type="string">
            <text:p>When modifying, start with all 5 Positions on 100 and try to get the 50 bar backpressure case</text:p>
          </table:table-cell>
          <table:table-cell office:value-type="float" office:value="1" calcext:value-type="float">
            <text:p>1</text:p>
          </table:table-cell>
          <table:table-cell table:style-name="ce27" table:formula="of:=[.D$11]/([.B$10]*[.G6]/100)-[.B$12]+[.B$6]+[.B$22]" office:value-type="float" office:value="814185.44713498" calcext:value-type="float">
            <text:p>814185</text:p>
          </table:table-cell>
          <table:table-cell table:formula="of:=[.$H6]+[.$D$32]" office:value-type="float" office:value="840852.113801646" calcext:value-type="float">
            <text:p>840852</text:p>
          </table:table-cell>
          <table:table-cell table:formula="of:=[.$H6]+[.$D$33]" office:value-type="float" office:value="830185.44713498" calcext:value-type="float">
            <text:p>830185</text:p>
          </table:table-cell>
          <table:table-cell table:formula="of:=[.$H6]+[.$D$34]" office:value-type="float" office:value="827518.780468313" calcext:value-type="float">
            <text:p>827519</text:p>
          </table:table-cell>
          <table:table-cell table:formula="of:=[.$H6]+[.$D$35]" office:value-type="float" office:value="824185.44713498" calcext:value-type="float">
            <text:p>824185</text:p>
          </table:table-cell>
          <table:table-cell table:formula="of:=[.$H6]+[.$D$36]" office:value-type="float" office:value="818185.44713498" calcext:value-type="float">
            <text:p>81818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o match the needed flow rate (which is now somewhat about 250 kg/s)</text:p>
          </table:table-cell>
          <table:table-cell office:value-type="float" office:value="3" calcext:value-type="float">
            <text:p>3</text:p>
          </table:table-cell>
          <table:table-cell table:style-name="ce27" table:formula="of:=[.D$11]/([.B$10]*[.G7]/100)-[.B$12]+[.B$6]+[.B$22]" office:value-type="float" office:value="271549.788220251" calcext:value-type="float">
            <text:p>271550</text:p>
          </table:table-cell>
          <table:table-cell table:formula="of:=[.$H7]+[.$D$32]" office:value-type="float" office:value="298216.454886918" calcext:value-type="float">
            <text:p>298216</text:p>
          </table:table-cell>
          <table:table-cell table:formula="of:=[.$H7]+[.$D$33]" office:value-type="float" office:value="287549.788220251" calcext:value-type="float">
            <text:p>287550</text:p>
          </table:table-cell>
          <table:table-cell table:formula="of:=[.$H7]+[.$D$34]" office:value-type="float" office:value="284883.121553584" calcext:value-type="float">
            <text:p>284883</text:p>
          </table:table-cell>
          <table:table-cell table:formula="of:=[.$H7]+[.$D$35]" office:value-type="float" office:value="281549.788220251" calcext:value-type="float">
            <text:p>281550</text:p>
          </table:table-cell>
          <table:table-cell table:formula="of:=[.$H7]+[.$D$36]" office:value-type="float" office:value="275549.788220251" calcext:value-type="float">
            <text:p>275550</text:p>
          </table:table-cell>
        </table:table-row>
        <table:table-row table:style-name="ro1">
          <table:table-cell table:style-name="ce1" office:value-type="string" calcext:value-type="string">
            <text:p>Valve Parameters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style-name="ce27" table:formula="of:=[.D$11]/([.B$10]*[.G8]/100)-[.B$12]+[.B$6]+[.B$22]" office:value-type="float" office:value="90671.2352486747" calcext:value-type="float">
            <text:p>90671</text:p>
          </table:table-cell>
          <table:table-cell table:formula="of:=[.$H8]+[.$D$32]" office:value-type="float" office:value="117337.901915341" calcext:value-type="float">
            <text:p>117338</text:p>
          </table:table-cell>
          <table:table-cell table:formula="of:=[.$H8]+[.$D$33]" office:value-type="float" office:value="106671.235248675" calcext:value-type="float">
            <text:p>106671</text:p>
          </table:table-cell>
          <table:table-cell table:formula="of:=[.$H8]+[.$D$34]" office:value-type="float" office:value="104004.568582008" calcext:value-type="float">
            <text:p>104005</text:p>
          </table:table-cell>
          <table:table-cell table:formula="of:=[.$H8]+[.$D$35]" office:value-type="float" office:value="100671.235248675" calcext:value-type="float">
            <text:p>100671</text:p>
          </table:table-cell>
          <table:table-cell table:formula="of:=[.$H8]+[.$D$36]" office:value-type="float" office:value="94671.2352486747" calcext:value-type="float">
            <text:p>94671</text:p>
          </table:table-cell>
        </table:table-row>
        <table:table-row table:style-name="ro1">
          <table:table-cell office:value-type="string" calcext:value-type="string">
            <text:p>Advanced Characteristic: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style-name="ce27" table:formula="of:=[.D$11]/([.B$10]*[.G9]/100)-[.B$12]+[.B$6]+[.B$22]" office:value-type="float" office:value="68061.4161272277" calcext:value-type="float">
            <text:p>68061</text:p>
          </table:table-cell>
          <table:table-cell table:formula="of:=[.$H9]+[.$D$32]" office:value-type="float" office:value="94728.0827938944" calcext:value-type="float">
            <text:p>94728</text:p>
          </table:table-cell>
          <table:table-cell table:formula="of:=[.$H9]+[.$D$33]" office:value-type="float" office:value="84061.4161272277" calcext:value-type="float">
            <text:p>84061</text:p>
          </table:table-cell>
          <table:table-cell table:formula="of:=[.$H9]+[.$D$34]" office:value-type="float" office:value="81394.749460561" calcext:value-type="float">
            <text:p>81395</text:p>
          </table:table-cell>
          <table:table-cell table:formula="of:=[.$H9]+[.$D$35]" office:value-type="float" office:value="78061.4161272277" calcext:value-type="float">
            <text:p>78061</text:p>
          </table:table-cell>
          <table:table-cell table:formula="of:=[.$H9]+[.$D$36]" office:value-type="float" office:value="72061.4161272277" calcext:value-type="float">
            <text:p>72061</text:p>
          </table:table-cell>
        </table:table-row>
        <table:table-row table:style-name="ro1">
          <table:table-cell office:value-type="string" calcext:value-type="string">
            <text:p>flowOpen</text:p>
          </table:table-cell>
          <table:table-cell table:style-name="ce2" office:value-type="float" office:value="430" calcext:value-type="float">
            <text:p>430</text:p>
          </table:table-cell>
          <table:table-cell office:value-type="string" calcext:value-type="string">
            <text:p>kg/s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style-name="ce27" table:formula="of:=[.D$11]/([.B$10]*[.G10]/100)-[.B$12]+[.B$6]+[.B$22]" office:value-type="float" office:value="45451.5970057807" calcext:value-type="float">
            <text:p>45452</text:p>
          </table:table-cell>
          <table:table-cell table:formula="of:=[.$H10]+[.$D$32]" office:value-type="float" office:value="72118.2636724473" calcext:value-type="float">
            <text:p>72118</text:p>
          </table:table-cell>
          <table:table-cell table:formula="of:=[.$H10]+[.$D$33]" office:value-type="float" office:value="61451.5970057807" calcext:value-type="float">
            <text:p>61452</text:p>
          </table:table-cell>
          <table:table-cell table:formula="of:=[.$H10]+[.$D$34]" office:value-type="float" office:value="58784.930339114" calcext:value-type="float">
            <text:p>58785</text:p>
          </table:table-cell>
          <table:table-cell table:formula="of:=[.$H10]+[.$D$35]" office:value-type="float" office:value="55451.5970057807" calcext:value-type="float">
            <text:p>55452</text:p>
          </table:table-cell>
          <table:table-cell table:formula="of:=[.$H10]+[.$D$36]" office:value-type="float" office:value="49451.5970057807" calcext:value-type="float">
            <text:p>49452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table:style-name="ce3" office:value-type="float" office:value="35" calcext:value-type="float">
            <text:p>35</text:p>
          </table:table-cell>
          <table:table-cell office:value-type="string" calcext:value-type="string">
            <text:p>bar</text:p>
          </table:table-cell>
          <table:table-cell table:style-name="ce5" table:formula="of:=[.B11]*100000" office:value-type="float" office:value="3500000" calcext:value-type="float">
            <text:p>3.50E+06</text:p>
          </table:table-cell>
          <table:table-cell office:value-type="string" calcext:value-type="string">
            <text:p>Pa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27" table:formula="of:=[.D$11]/([.B$10]*[.G11]/100)-[.B$12]+[.B$6]+[.B$22]" office:value-type="float" office:value="29301.7262047471" calcext:value-type="float">
            <text:p>29302</text:p>
          </table:table-cell>
          <table:table-cell table:formula="of:=[.$H11]+[.$D$32]" office:value-type="float" office:value="55968.3928714137" calcext:value-type="float">
            <text:p>55968</text:p>
          </table:table-cell>
          <table:table-cell table:formula="of:=[.$H11]+[.$D$33]" office:value-type="float" office:value="45301.7262047471" calcext:value-type="float">
            <text:p>45302</text:p>
          </table:table-cell>
          <table:table-cell table:formula="of:=[.$H11]+[.$D$34]" office:value-type="float" office:value="42635.0595380804" calcext:value-type="float">
            <text:p>42635</text:p>
          </table:table-cell>
          <table:table-cell table:formula="of:=[.$H11]+[.$D$35]" office:value-type="float" office:value="39301.7262047471" calcext:value-type="float">
            <text:p>39302</text:p>
          </table:table-cell>
          <table:table-cell table:formula="of:=[.$H11]+[.$D$36]" office:value-type="float" office:value="33301.7262047471" calcext:value-type="float">
            <text:p>33302</text:p>
          </table:table-cell>
        </table:table-row>
        <table:table-row table:style-name="ro1">
          <table:table-cell office:value-type="string" calcext:value-type="string">
            <text:p>resistance</text:p>
          </table:table-cell>
          <table:table-cell table:style-name="ce2" office:value-type="float" office:value="8000" calcext:value-type="float">
            <text:p>8000</text:p>
          </table:table-cell>
          <table:table-cell office:value-type="string" calcext:value-type="string">
            <text:p>Pa*s/kg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style-name="ce27" table:formula="of:=[.D$11]/([.B$10]*[.G12]/100)-[.B$12]+[.B$6]+[.B$22]" office:value-type="float" office:value="23487.772716375" calcext:value-type="float">
            <text:p>23488</text:p>
          </table:table-cell>
          <table:table-cell table:formula="of:=[.$H12]+[.$D$32]" office:value-type="float" office:value="50154.4393830416" calcext:value-type="float">
            <text:p>50154</text:p>
          </table:table-cell>
          <table:table-cell table:formula="of:=[.$H12]+[.$D$33]" office:value-type="float" office:value="39487.772716375" calcext:value-type="float">
            <text:p>39488</text:p>
          </table:table-cell>
          <table:table-cell table:formula="of:=[.$H12]+[.$D$34]" office:value-type="float" office:value="36821.1060497083" calcext:value-type="float">
            <text:p>36821</text:p>
          </table:table-cell>
          <table:table-cell table:formula="of:=[.$H12]+[.$D$35]" office:value-type="float" office:value="33487.772716375" calcext:value-type="float">
            <text:p>33488</text:p>
          </table:table-cell>
          <table:table-cell table:formula="of:=[.$H12]+[.$D$36]" office:value-type="float" office:value="27487.772716375" calcext:value-type="float">
            <text:p>27488</text:p>
          </table:table-cell>
        </table:table-row>
        <table:table-row table:style-name="ro1">
          <table:table-cell table:number-columns-repeated="6"/>
          <table:table-cell office:value-type="float" office:value="55" calcext:value-type="float">
            <text:p>55</text:p>
          </table:table-cell>
          <table:table-cell table:style-name="ce27" table:formula="of:=[.D$11]/([.B$10]*[.G13]/100)-[.B$12]+[.B$6]+[.B$22]" office:value-type="float" office:value="15031.1130969247" calcext:value-type="float">
            <text:p>15031</text:p>
          </table:table-cell>
          <table:table-cell table:formula="of:=[.$H13]+[.$D$32]" office:value-type="float" office:value="41697.7797635913" calcext:value-type="float">
            <text:p>41698</text:p>
          </table:table-cell>
          <table:table-cell table:formula="of:=[.$H13]+[.$D$33]" office:value-type="float" office:value="31031.1130969247" calcext:value-type="float">
            <text:p>31031</text:p>
          </table:table-cell>
          <table:table-cell table:formula="of:=[.$H13]+[.$D$34]" office:value-type="float" office:value="28364.446430258" calcext:value-type="float">
            <text:p>28364</text:p>
          </table:table-cell>
          <table:table-cell table:formula="of:=[.$H13]+[.$D$35]" office:value-type="float" office:value="25031.1130969247" calcext:value-type="float">
            <text:p>25031</text:p>
          </table:table-cell>
          <table:table-cell table:formula="of:=[.$H13]+[.$D$36]" office:value-type="float" office:value="19031.1130969247" calcext:value-type="float">
            <text:p>190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Flow</text:p>
          </table:table-cell>
          <table:table-cell table:formula="of:=[.D11]/[.B12]" office:value-type="float" office:value="437.5" calcext:value-type="float">
            <text:p>437.5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style-name="ce27" table:formula="of:=[.D$11]/([.B$10]*[.G14]/100)-[.B$12]+[.B$6]+[.B$22]" office:value-type="float" office:value="11859.8657396308" calcext:value-type="float">
            <text:p>11860</text:p>
          </table:table-cell>
          <table:table-cell table:formula="of:=[.$H14]+[.$D$32]" office:value-type="float" office:value="38526.5324062975" calcext:value-type="float">
            <text:p>38527</text:p>
          </table:table-cell>
          <table:table-cell table:formula="of:=[.$H14]+[.$D$33]" office:value-type="float" office:value="27859.8657396308" calcext:value-type="float">
            <text:p>27860</text:p>
          </table:table-cell>
          <table:table-cell table:formula="of:=[.$H14]+[.$D$34]" office:value-type="float" office:value="25193.1990729641" calcext:value-type="float">
            <text:p>25193</text:p>
          </table:table-cell>
          <table:table-cell table:formula="of:=[.$H14]+[.$D$35]" office:value-type="float" office:value="21859.8657396308" calcext:value-type="float">
            <text:p>21860</text:p>
          </table:table-cell>
          <table:table-cell table:formula="of:=[.$H14]+[.$D$36]" office:value-type="float" office:value="15859.8657396308" calcext:value-type="float">
            <text:p>15860</text:p>
          </table:table-cell>
        </table:table-row>
        <table:table-row table:style-name="ro1">
          <table:table-cell table:style-name="ce22" table:number-columns-spanned="4" table:number-rows-spanned="1"/>
          <table:covered-table-cell table:number-columns-repeated="3"/>
          <table:table-cell table:number-columns-repeated="2"/>
          <table:table-cell office:value-type="float" office:value="100" calcext:value-type="float">
            <text:p>100</text:p>
          </table:table-cell>
          <table:table-cell table:style-name="ce27" table:formula="of:=[.D$11]/([.B$10]*[.G15]/100)-[.B$12]+[.B$6]+[.B$22]" office:value-type="float" office:value="8371.49364660753" calcext:value-type="float">
            <text:p>8371</text:p>
          </table:table-cell>
          <table:table-cell table:formula="of:=[.$H15]+[.$D$32]" office:value-type="float" office:value="35038.1603132742" calcext:value-type="float">
            <text:p>35038</text:p>
          </table:table-cell>
          <table:table-cell table:formula="of:=[.$H15]+[.$D$33]" office:value-type="float" office:value="24371.4936466075" calcext:value-type="float">
            <text:p>24371</text:p>
          </table:table-cell>
          <table:table-cell table:formula="of:=[.$H15]+[.$D$34]" office:value-type="float" office:value="21704.8269799409" calcext:value-type="float">
            <text:p>21705</text:p>
          </table:table-cell>
          <table:table-cell table:formula="of:=[.$H15]+[.$D$35]" office:value-type="float" office:value="18371.4936466075" calcext:value-type="float">
            <text:p>18371</text:p>
          </table:table-cell>
          <table:table-cell table:formula="of:=[.$H15]+[.$D$36]" office:value-type="float" office:value="12371.4936466075" calcext:value-type="float">
            <text:p>12371</text:p>
          </table:table-cell>
        </table:table-row>
        <table:table-row table:style-name="ro1">
          <table:table-cell table:style-name="ce1" office:value-type="string" calcext:value-type="string">
            <text:p>Plant parameter</text:p>
          </table:table-cell>
          <table:table-cell table:style-name="ce24"/>
          <table:table-cell table:number-columns-repeated="6"/>
          <table:table-cell table:style-name="Default" table:number-columns-repeated="5"/>
        </table:table-row>
        <table:table-row table:style-name="ro1">
          <table:table-cell/>
          <table:table-cell table:style-name="ce24"/>
          <table:table-cell table:number-columns-repeated="6"/>
          <table:table-cell table:style-name="Default" table:number-columns-repeated="5"/>
        </table:table-row>
        <table:table-row table:style-name="ro1">
          <table:table-cell office:value-type="string" calcext:value-type="string">
            <text:p>Reduction Valve Characteristic:</text:p>
          </table:table-cell>
          <table:table-cell table:style-name="ce24"/>
          <table:table-cell table:number-columns-repeated="6"/>
          <table:table-cell table:style-name="ce29" office:value-type="string" calcext:value-type="string" table:number-columns-spanned="5" table:number-rows-spanned="1">
            <text:p>Calculated Flow Rates</text:p>
          </table:table-cell>
          <table:covered-table-cell table:number-columns-repeated="4" table:style-name="Default"/>
        </table:table-row>
        <table:table-row table:style-name="ro1">
          <table:table-cell office:value-type="string" calcext:value-type="string">
            <text:p>resistanceFullOpen:</text:p>
          </table:table-cell>
          <table:table-cell table:style-name="ce25" office:value-type="float" office:value="4000" calcext:value-type="float">
            <text:p>4000</text:p>
          </table:table-cell>
          <table:table-cell office:value-type="string" calcext:value-type="string">
            <text:p>Pa*s/kg</text:p>
          </table:table-cell>
          <table:table-cell table:number-columns-repeated="3"/>
          <table:table-cell table:formula="of:=[.G5]" office:value-type="float" office:value="0.1" calcext:value-type="float">
            <text:p>0.1</text:p>
          </table:table-cell>
          <table:table-cell/>
          <table:table-cell table:formula="of:=([.$D$2]-[.$D$24])/[.I5]" office:value-type="float" office:value="1.10207228037986" calcext:value-type="float">
            <text:p>1</text:p>
          </table:table-cell>
          <table:table-cell table:formula="of:=([.$D$2]-[.$D$25])/[.J5]" office:value-type="float" office:value="0.980901018200714" calcext:value-type="float">
            <text:p>1</text:p>
          </table:table-cell>
          <table:table-cell table:formula="of:=([.$D$2]-[.$D$26])/[.K5]" office:value-type="float" office:value="0.834038568564315" calcext:value-type="float">
            <text:p>1</text:p>
          </table:table-cell>
          <table:table-cell table:formula="of:=([.$D$2]-[.$D$27])/[.L5]" office:value-type="float" office:value="0.699406511887744" calcext:value-type="float">
            <text:p>1</text:p>
          </table:table-cell>
          <table:table-cell table:formula="of:=([.$D$2]-[.$D$28])/[.M5]" office:value-type="float" office:value="0.491173197534719" calcext:value-type="float">
            <text:p>0</text:p>
          </table:table-cell>
        </table:table-row>
        <table:table-row table:style-name="ro1">
          <table:table-cell/>
          <table:table-cell table:style-name="ce24"/>
          <table:table-cell table:number-columns-repeated="4"/>
          <table:table-cell table:formula="of:=[.G6]" office:value-type="float" office:value="1" calcext:value-type="float">
            <text:p>1</text:p>
          </table:table-cell>
          <table:table-cell/>
          <table:table-cell table:formula="of:=([.$D$2]-[.$D$24])/[.I6]" office:value-type="float" office:value="10.7034279301616" calcext:value-type="float">
            <text:p>11</text:p>
          </table:table-cell>
          <table:table-cell table:formula="of:=([.$D$2]-[.$D$25])/[.J6]" office:value-type="float" office:value="9.63640115302971" calcext:value-type="float">
            <text:p>10</text:p>
          </table:table-cell>
          <table:table-cell table:formula="of:=([.$D$2]-[.$D$26])/[.K6]" office:value-type="float" office:value="8.21733616263273" calcext:value-type="float">
            <text:p>8</text:p>
          </table:table-cell>
          <table:table-cell table:formula="of:=([.$D$2]-[.$D$27])/[.L6]" office:value-type="float" office:value="6.91591925071505" calcext:value-type="float">
            <text:p>7</text:p>
          </table:table-cell>
          <table:table-cell table:formula="of:=([.$D$2]-[.$D$28])/[.M6]" office:value-type="float" office:value="4.88886720486988" calcext:value-type="float">
            <text:p>5</text:p>
          </table:table-cell>
        </table:table-row>
        <table:table-row table:style-name="ro1">
          <table:table-cell office:value-type="string" calcext:value-type="string">
            <text:p>Calculated Shutoff Valve Characteristic:</text:p>
          </table:table-cell>
          <table:table-cell table:style-name="ce24"/>
          <table:table-cell table:number-columns-repeated="4"/>
          <table:table-cell table:formula="of:=[.G7]" office:value-type="float" office:value="3" calcext:value-type="float">
            <text:p>3</text:p>
          </table:table-cell>
          <table:table-cell/>
          <table:table-cell table:formula="of:=([.$D$2]-[.$D$24])/[.I7]" office:value-type="float" office:value="30.179421197307" calcext:value-type="float">
            <text:p>30</text:p>
          </table:table-cell>
          <table:table-cell table:formula="of:=([.$D$2]-[.$D$25])/[.J7]" office:value-type="float" office:value="27.8212689688102" calcext:value-type="float">
            <text:p>28</text:p>
          </table:table-cell>
          <table:table-cell table:formula="of:=([.$D$2]-[.$D$26])/[.K7]" office:value-type="float" office:value="23.8694379748327" calcext:value-type="float">
            <text:p>24</text:p>
          </table:table-cell>
          <table:table-cell table:formula="of:=([.$D$2]-[.$D$27])/[.L7]" office:value-type="float" office:value="20.245087151481" calcext:value-type="float">
            <text:p>20</text:p>
          </table:table-cell>
          <table:table-cell table:formula="of:=([.$D$2]-[.$D$28])/[.M7]" office:value-type="float" office:value="14.5164328589603" calcext:value-type="float">
            <text:p>15</text:p>
          </table:table-cell>
        </table:table-row>
        <table:table-row table:style-name="ro1">
          <table:table-cell office:value-type="string" calcext:value-type="string">
            <text:p>resistanceFullOpen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Pa*s/kg</text:p>
          </table:table-cell>
          <table:table-cell office:value-type="string" calcext:value-type="string">
            <text:p>calculated from diff</text:p>
          </table:table-cell>
          <table:table-cell table:number-columns-repeated="2"/>
          <table:table-cell table:formula="of:=[.G8]" office:value-type="float" office:value="9" calcext:value-type="float">
            <text:p>9</text:p>
          </table:table-cell>
          <table:table-cell/>
          <table:table-cell table:formula="of:=([.$D$2]-[.$D$24])/[.I8]" office:value-type="float" office:value="76.701558942936" calcext:value-type="float">
            <text:p>77</text:p>
          </table:table-cell>
          <table:table-cell table:formula="of:=([.$D$2]-[.$D$25])/[.J8]" office:value-type="float" office:value="74.9967878533533" calcext:value-type="float">
            <text:p>75</text:p>
          </table:table-cell>
          <table:table-cell table:formula="of:=([.$D$2]-[.$D$26])/[.K8]" office:value-type="float" office:value="65.3817432513858" calcext:value-type="float">
            <text:p>65</text:p>
          </table:table-cell>
          <table:table-cell table:formula="of:=([.$D$2]-[.$D$27])/[.L8]" office:value-type="float" office:value="56.6199469582354" calcext:value-type="float">
            <text:p>57</text:p>
          </table:table-cell>
          <table:table-cell table:formula="of:=([.$D$2]-[.$D$28])/[.M8]" office:value-type="float" office:value="42.2514820842162" calcext:value-type="float">
            <text:p>42</text:p>
          </table:table-cell>
        </table:table-row>
        <table:table-row table:style-name="ro1">
          <table:table-cell/>
          <table:table-cell table:style-name="ce24"/>
          <table:table-cell table:number-columns-repeated="4"/>
          <table:table-cell table:formula="of:=[.G9]" office:value-type="float" office:value="12" calcext:value-type="float">
            <text:p>12</text:p>
          </table:table-cell>
          <table:table-cell/>
          <table:table-cell table:formula="of:=([.$D$2]-[.$D$24])/[.I9]" office:value-type="float" office:value="95.0087844549947" calcext:value-type="float">
            <text:p>95</text:p>
          </table:table-cell>
          <table:table-cell table:formula="of:=([.$D$2]-[.$D$25])/[.J9]" office:value-type="float" office:value="95.1685133152162" calcext:value-type="float">
            <text:p>95</text:p>
          </table:table-cell>
          <table:table-cell table:formula="of:=([.$D$2]-[.$D$26])/[.K9]" office:value-type="float" office:value="83.5434723377934" calcext:value-type="float">
            <text:p>84</text:p>
          </table:table-cell>
          <table:table-cell table:formula="of:=([.$D$2]-[.$D$27])/[.L9]" office:value-type="float" office:value="73.0194285831288" calcext:value-type="float">
            <text:p>73</text:p>
          </table:table-cell>
          <table:table-cell table:formula="of:=([.$D$2]-[.$D$28])/[.M9]" office:value-type="float" office:value="55.5082069569354" calcext:value-type="float">
            <text:p>56</text:p>
          </table:table-cell>
        </table:table-row>
        <table:table-row table:style-name="ro1">
          <table:table-cell office:value-type="string" calcext:value-type="string">
            <text:p>backPressure 1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bar</text:p>
          </table:table-cell>
          <table:table-cell table:style-name="ce5" table:formula="of:=[.B24]*100000" office:value-type="float" office:value="500000" calcext:value-type="float">
            <text:p>5.00E+05</text:p>
          </table:table-cell>
          <table:table-cell office:value-type="string" calcext:value-type="string">
            <text:p>Pa</text:p>
          </table:table-cell>
          <table:table-cell/>
          <table:table-cell table:formula="of:=[.G10]" office:value-type="float" office:value="18" calcext:value-type="float">
            <text:p>18</text:p>
          </table:table-cell>
          <table:table-cell/>
          <table:table-cell table:formula="of:=([.$D$2]-[.$D$24])/[.I10]" office:value-type="float" office:value="124.795017817913" calcext:value-type="float">
            <text:p>125</text:p>
          </table:table-cell>
          <table:table-cell table:formula="of:=([.$D$2]-[.$D$25])/[.J10]" office:value-type="float" office:value="130.183760712475" calcext:value-type="float">
            <text:p>130</text:p>
          </table:table-cell>
          <table:table-cell table:formula="of:=([.$D$2]-[.$D$26])/[.K10]" office:value-type="float" office:value="115.675904705044" calcext:value-type="float">
            <text:p>116</text:p>
          </table:table-cell>
          <table:table-cell table:formula="of:=([.$D$2]-[.$D$27])/[.L10]" office:value-type="float" office:value="102.792350586509" calcext:value-type="float">
            <text:p>103</text:p>
          </table:table-cell>
          <table:table-cell table:formula="of:=([.$D$2]-[.$D$28])/[.M10]" office:value-type="float" office:value="80.887175383485" calcext:value-type="float">
            <text:p>81</text:p>
          </table:table-cell>
        </table:table-row>
        <table:table-row table:style-name="ro1">
          <table:table-cell office:value-type="string" calcext:value-type="string">
            <text:p>backPressure 2</text:p>
          </table:table-cell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bar</text:p>
          </table:table-cell>
          <table:table-cell table:style-name="ce5" table:formula="of:=[.B25]*100000" office:value-type="float" office:value="1500000" calcext:value-type="float">
            <text:p>1.50E+06</text:p>
          </table:table-cell>
          <table:table-cell office:value-type="string" calcext:value-type="string">
            <text:p>Pa</text:p>
          </table:table-cell>
          <table:table-cell/>
          <table:table-cell table:formula="of:=[.G11]" office:value-type="float" office:value="28" calcext:value-type="float">
            <text:p>28</text:p>
          </table:table-cell>
          <table:table-cell/>
          <table:table-cell table:formula="of:=([.$D$2]-[.$D$24])/[.I11]" office:value-type="float" office:value="160.805046174496" calcext:value-type="float">
            <text:p>161</text:p>
          </table:table-cell>
          <table:table-cell table:formula="of:=([.$D$2]-[.$D$25])/[.J11]" office:value-type="float" office:value="176.593712209618" calcext:value-type="float">
            <text:p>177</text:p>
          </table:table-cell>
          <table:table-cell table:formula="of:=([.$D$2]-[.$D$26])/[.K11]" office:value-type="float" office:value="159.49315126267" calcext:value-type="float">
            <text:p>159</text:p>
          </table:table-cell>
          <table:table-cell table:formula="of:=([.$D$2]-[.$D$27])/[.L11]" office:value-type="float" office:value="145.031797593448" calcext:value-type="float">
            <text:p>145</text:p>
          </table:table-cell>
          <table:table-cell table:formula="of:=([.$D$2]-[.$D$28])/[.M11]" office:value-type="float" office:value="120.113893658456" calcext:value-type="float">
            <text:p>120</text:p>
          </table:table-cell>
        </table:table-row>
        <table:table-row table:style-name="ro1">
          <table:table-cell office:value-type="string" calcext:value-type="string">
            <text:p>backPressure 3</text:p>
          </table:table-cell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bar</text:p>
          </table:table-cell>
          <table:table-cell table:style-name="ce5" table:formula="of:=[.B26]*100000" office:value-type="float" office:value="2700000" calcext:value-type="float">
            <text:p>2.70E+06</text:p>
          </table:table-cell>
          <table:table-cell office:value-type="string" calcext:value-type="string">
            <text:p>Pa</text:p>
          </table:table-cell>
          <table:table-cell/>
          <table:table-cell table:formula="of:=[.G12]" office:value-type="float" office:value="35" calcext:value-type="float">
            <text:p>35</text:p>
          </table:table-cell>
          <table:table-cell/>
          <table:table-cell table:formula="of:=([.$D$2]-[.$D$24])/[.I12]" office:value-type="float" office:value="179.445730242637" calcext:value-type="float">
            <text:p>179</text:p>
          </table:table-cell>
          <table:table-cell table:formula="of:=([.$D$2]-[.$D$25])/[.J12]" office:value-type="float" office:value="202.594358954121" calcext:value-type="float">
            <text:p>203</text:p>
          </table:table-cell>
          <table:table-cell table:formula="of:=([.$D$2]-[.$D$26])/[.K12]" office:value-type="float" office:value="184.676690342219" calcext:value-type="float">
            <text:p>185</text:p>
          </table:table-cell>
          <table:table-cell table:formula="of:=([.$D$2]-[.$D$27])/[.L12]" office:value-type="float" office:value="170.211379785578" calcext:value-type="float">
            <text:p>170</text:p>
          </table:table-cell>
          <table:table-cell table:formula="of:=([.$D$2]-[.$D$28])/[.M12]" office:value-type="float" office:value="145.519247458603" calcext:value-type="float">
            <text:p>146</text:p>
          </table:table-cell>
        </table:table-row>
        <table:table-row table:style-name="ro1">
          <table:table-cell office:value-type="string" calcext:value-type="string">
            <text:p>backPressure 4</text:p>
          </table:table-cell>
          <table:table-cell table:style-name="ce2" office:value-type="float" office:value="38" calcext:value-type="float">
            <text:p>38</text:p>
          </table:table-cell>
          <table:table-cell office:value-type="string" calcext:value-type="string">
            <text:p>bar</text:p>
          </table:table-cell>
          <table:table-cell table:style-name="ce5" table:formula="of:=[.B27]*100000" office:value-type="float" office:value="3800000" calcext:value-type="float">
            <text:p>3.80E+06</text:p>
          </table:table-cell>
          <table:table-cell office:value-type="string" calcext:value-type="string">
            <text:p>Pa</text:p>
          </table:table-cell>
          <table:table-cell/>
          <table:table-cell table:formula="of:=[.G13]" office:value-type="float" office:value="55" calcext:value-type="float">
            <text:p>55</text:p>
          </table:table-cell>
          <table:table-cell/>
          <table:table-cell table:formula="of:=([.$D$2]-[.$D$24])/[.I13]" office:value-type="float" office:value="215.838830053451" calcext:value-type="float">
            <text:p>216</text:p>
          </table:table-cell>
          <table:table-cell table:formula="of:=([.$D$2]-[.$D$25])/[.J13]" office:value-type="float" office:value="257.805769809554" calcext:value-type="float">
            <text:p>258</text:p>
          </table:table-cell>
          <table:table-cell table:formula="of:=([.$D$2]-[.$D$26])/[.K13]" office:value-type="float" office:value="239.736742852349" calcext:value-type="float">
            <text:p>240</text:p>
          </table:table-cell>
          <table:table-cell table:formula="of:=([.$D$2]-[.$D$27])/[.L13]" office:value-type="float" office:value="227.716601252555" calcext:value-type="float">
            <text:p>228</text:p>
          </table:table-cell>
          <table:table-cell table:formula="of:=([.$D$2]-[.$D$28])/[.M13]" office:value-type="float" office:value="210.182135938564" calcext:value-type="float">
            <text:p>210</text:p>
          </table:table-cell>
        </table:table-row>
        <table:table-row table:style-name="ro1">
          <table:table-cell office:value-type="string" calcext:value-type="string">
            <text:p>backPressure 5</text:p>
          </table:table-cell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bar</text:p>
          </table:table-cell>
          <table:table-cell table:style-name="ce5" table:formula="of:=[.B28]*100000" office:value-type="float" office:value="5500000" calcext:value-type="float">
            <text:p>5.50E+06</text:p>
          </table:table-cell>
          <table:table-cell office:value-type="string" calcext:value-type="string">
            <text:p>Pa</text:p>
          </table:table-cell>
          <table:table-cell/>
          <table:table-cell table:formula="of:=[.G14]" office:value-type="float" office:value="70" calcext:value-type="float">
            <text:p>70</text:p>
          </table:table-cell>
          <table:table-cell/>
          <table:table-cell table:formula="of:=([.$D$2]-[.$D$24])/[.I14]" office:value-type="float" office:value="233.60524391572" calcext:value-type="float">
            <text:p>234</text:p>
          </table:table-cell>
          <table:table-cell table:formula="of:=([.$D$2]-[.$D$25])/[.J14]" office:value-type="float" office:value="287.151419707668" calcext:value-type="float">
            <text:p>287</text:p>
          </table:table-cell>
          <table:table-cell table:formula="of:=([.$D$2]-[.$D$26])/[.K14]" office:value-type="float" office:value="269.914113737837" calcext:value-type="float">
            <text:p>270</text:p>
          </table:table-cell>
          <table:table-cell table:formula="of:=([.$D$2]-[.$D$27])/[.L14]" office:value-type="float" office:value="260.751830221272" calcext:value-type="float">
            <text:p>261</text:p>
          </table:table-cell>
          <table:table-cell table:formula="of:=([.$D$2]-[.$D$28])/[.M14]" office:value-type="float" office:value="252.208944619548" calcext:value-type="float">
            <text:p>252</text:p>
          </table:table-cell>
        </table:table-row>
        <table:table-row table:style-name="ro1">
          <table:table-cell table:number-columns-repeated="6"/>
          <table:table-cell table:formula="of:=[.G15]" office:value-type="float" office:value="100" calcext:value-type="float">
            <text:p>100</text:p>
          </table:table-cell>
          <table:table-cell/>
          <table:table-cell table:formula="of:=([.$D$2]-[.$D$24])/[.I15]" office:value-type="float" office:value="256.862801001294" calcext:value-type="float">
            <text:p>257</text:p>
          </table:table-cell>
          <table:table-cell table:formula="of:=([.$D$2]-[.$D$25])/[.J15]" office:value-type="float" office:value="328.25234743516" calcext:value-type="float">
            <text:p>328</text:p>
          </table:table-cell>
          <table:table-cell table:formula="of:=([.$D$2]-[.$D$26])/[.K15]" office:value-type="float" office:value="313.294365639699" calcext:value-type="float">
            <text:p>313</text:p>
          </table:table-cell>
          <table:table-cell table:formula="of:=([.$D$2]-[.$D$27])/[.L15]" office:value-type="float" office:value="310.263286679064" calcext:value-type="float">
            <text:p>310</text:p>
          </table:table-cell>
          <table:table-cell table:formula="of:=([.$D$2]-[.$D$28])/[.M15]" office:value-type="float" office:value="323.323934381752" calcext:value-type="float">
            <text:p>323</text:p>
          </table:table-cell>
        </table:table-row>
        <table:table-row table:style-name="ro1">
          <table:table-cell table:number-columns-repeated="3"/>
          <table:table-cell table:style-name="ce26"/>
          <table:table-cell table:number-columns-repeated="4"/>
          <table:table-cell table:style-name="Default" table:number-columns-repeated="5"/>
        </table:table-row>
        <table:table-row table:style-name="ro1">
          <table:table-cell office:value-type="string" calcext:value-type="string">
            <text:p>Reduction Valve Positions for each backPressure Value above:</text:p>
          </table:table-cell>
          <table:table-cell table:number-columns-repeated="2"/>
          <table:table-cell table:style-name="ce2"/>
          <table:table-cell table:number-columns-repeated="4"/>
          <table:table-cell table:style-name="Default" table:number-columns-repeated="5"/>
        </table:table-row>
        <table:table-row table:style-name="ro1">
          <table:table-cell office:value-type="string" calcext:value-type="string">
            <text:p>Position 1</text:p>
          </table:table-cell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%</text:p>
          </table:table-cell>
          <table:table-cell table:formula="of:=[.B$19]*100/[.B32]" office:value-type="float" office:value="26666.6666666667" calcext:value-type="float">
            <text:p>26666.6666666667</text:p>
          </table:table-cell>
          <table:table-cell office:value-type="string" calcext:value-type="string">
            <text:p>Pa*s/kg</text:p>
          </table:table-cell>
          <table:table-cell table:number-columns-repeated="3"/>
          <table:table-cell table:style-name="Default" table:number-columns-repeated="5"/>
        </table:table-row>
        <table:table-row table:style-name="ro1">
          <table:table-cell office:value-type="string" calcext:value-type="string">
            <text:p>Position 2</text:p>
          </table:table-cell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%</text:p>
          </table:table-cell>
          <table:table-cell table:formula="of:=[.B$19]*100/[.B33]" office:value-type="float" office:value="16000" calcext:value-type="float">
            <text:p>16000</text:p>
          </table:table-cell>
          <table:table-cell office:value-type="string" calcext:value-type="string">
            <text:p>Pa*s/kg</text:p>
          </table:table-cell>
          <table:table-cell table:number-columns-repeated="3"/>
          <table:table-cell table:style-name="Default" table:number-columns-repeated="5"/>
        </table:table-row>
        <table:table-row table:style-name="ro1">
          <table:table-cell office:value-type="string" calcext:value-type="string">
            <text:p>Position 3</text:p>
          </table:table-cell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%</text:p>
          </table:table-cell>
          <table:table-cell table:formula="of:=[.B$19]*100/[.B34]" office:value-type="float" office:value="13333.3333333333" calcext:value-type="float">
            <text:p>13333.3333333333</text:p>
          </table:table-cell>
          <table:table-cell office:value-type="string" calcext:value-type="string">
            <text:p>Pa*s/kg</text:p>
          </table:table-cell>
          <table:table-cell table:number-columns-repeated="3"/>
          <table:table-cell table:style-name="Default" table:number-columns-repeated="5"/>
        </table:table-row>
        <table:table-row table:style-name="ro1">
          <table:table-cell office:value-type="string" calcext:value-type="string">
            <text:p>Position 4</text:p>
          </table:table-cell>
          <table:table-cell table:style-name="ce3" office:value-type="float" office:value="40" calcext:value-type="float">
            <text:p>40</text:p>
          </table:table-cell>
          <table:table-cell office:value-type="string" calcext:value-type="string">
            <text:p>%</text:p>
          </table:table-cell>
          <table:table-cell table:formula="of:=[.B$19]*100/[.B35]" office:value-type="float" office:value="10000" calcext:value-type="float">
            <text:p>10000</text:p>
          </table:table-cell>
          <table:table-cell office:value-type="string" calcext:value-type="string">
            <text:p>Pa*s/kg</text:p>
          </table:table-cell>
          <table:table-cell table:number-columns-repeated="3"/>
          <table:table-cell table:style-name="Default" table:number-columns-repeated="5"/>
        </table:table-row>
        <table:table-row table:style-name="ro1">
          <table:table-cell office:value-type="string" calcext:value-type="string">
            <text:p>Position 5</text:p>
          </table:table-cell>
          <table:table-cell table:style-name="ce3"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table:formula="of:=[.B$19]*100/[.B36]" office:value-type="float" office:value="4000" calcext:value-type="float">
            <text:p>4000</text:p>
          </table:table-cell>
          <table:table-cell office:value-type="string" calcext:value-type="string">
            <text:p>Pa*s/kg</text:p>
          </table:table-cell>
          <table:table-cell table:number-columns-repeated="3"/>
          <table:table-cell table:style-name="Default" table:number-columns-repeated="5"/>
        </table:table-row>
        <calcext:conditional-formats>
          <calcext:conditional-format calcext:target-range-address="'Feedwater Startup'.H5:'Feedwater Startup'.H15">
            <calcext:condition calcext:apply-style-name="Bad" calcext:value="&lt;0" calcext:base-cell-address="'Feedwater Startup'.H5"/>
          </calcext:conditional-format>
          <calcext:conditional-format calcext:target-range-address="'Feedwater Startup'.H5:'Feedwater Startup'.H15">
            <calcext:condition calcext:apply-style-name="Error" calcext:value="&lt;0" calcext:base-cell-address="'Feedwater Startup'.H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3">00/00/0000</text:date>, <text:time style:data-style-name="N2" text:time-value="13:22:55.4678740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4T08:01:02.966907688</meta:creation-date>
    <dc:date>2026-05-03T15:37:11.568899330</dc:date>
    <meta:editing-duration>PT3H12M54S</meta:editing-duration>
    <meta:editing-cycles>22</meta:editing-cycles>
    <meta:generator>LibreOffice/25.2.3.2$Linux_X86_64 LibreOffice_project/520$Build-2</meta:generator>
    <meta:document-statistic meta:table-count="3" meta:cell-count="635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0" chart:interval-major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title svg:x="5.167cm" svg:y="0.316cm" chart:style-name="ch2">
          <text:p>Simple Valve Characteristic</text:p>
        </chart:title>
        <chart:legend chart:legend-position="end" svg:x="13.299cm" svg:y="3.703cm" style:legend-expansion="high" chart:style-name="ch3"/>
        <chart:plot-area chart:style-name="ch4" svg:x="1.081cm" svg:y="1.273cm" svg:width="11.896cm" svg:height="6.564cm">
          <chart:coordinate-region svg:x="2.097cm" svg:y="1.473cm" svg:width="10.591cm" svg:height="5.717cm"/>
          <chart:axis chart:dimension="x" chart:name="primary-x" chart:style-name="ch5">
            <chart:title svg:x="5.295cm" svg:y="8.017cm" chart:style-name="ch2">
              <text:p><text:span text:style-name="T1">Reg. Valve Position (%)</text:span></text:p>
            </chart:title>
          </chart:axis>
          <chart:axis chart:dimension="y" chart:name="primary-y" chart:style-name="ch6">
            <chart:title svg:x="0.201cm" svg:y="5.785cm" chart:style-name="ch7">
              <text:p><text:span text:style-name="T1">Total Flow (kg/s)</text:span></text:p>
            </chart:title>
            <chart:grid chart:style-name="ch8" chart:class="major"/>
          </chart:axis>
          <chart:series chart:style-name="ch9" chart:values-cell-range-address="Condensation.M5:Condensation.M15" chart:label-cell-address="Condensation.M4:Condensation.M4" chart:class="chart:scatter">
            <chart:domain table:cell-range-address="Condensation.G5:Condensation.G15"/>
            <chart:data-point chart:repeated="11"/>
          </chart:series>
          <chart:series chart:style-name="ch10" chart:values-cell-range-address="Condensation.N5:Condensation.N15" chart:label-cell-address="Condensation.N4:Condensation.N4" chart:class="chart:scatter">
            <chart:data-point chart:repeated="11"/>
          </chart:series>
          <chart:series chart:style-name="ch11" chart:values-cell-range-address="Condensation.O5:Condensation.O15" chart:label-cell-address="Condensation.O4:Condensation.O4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1 Pump</text:p>
                <draw:g>
                  <svg:desc>Condensation.M4:Condensation.M4</svg:desc>
                </draw:g>
              </table:table-cell>
              <table:table-cell office:value-type="string">
                <text:p>2 Pumps</text:p>
                <draw:g>
                  <svg:desc>Condensation.N4:Condensation.N4</svg:desc>
                </draw:g>
              </table:table-cell>
              <table:table-cell office:value-type="string">
                <text:p>3 Pumps</text:p>
                <draw:g>
                  <svg:desc>Condensation.O4:Condensation.O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Condensation.G5:Condensation.G15</svg:desc>
                </draw:g>
              </table:table-cell>
              <table:table-cell office:value-type="float" office:value="4.53088739087192">
                <text:p>4.53088739087192</text:p>
                <draw:g>
                  <svg:desc>Condensation.M5:Condensation.M15</svg:desc>
                </draw:g>
              </table:table-cell>
              <table:table-cell office:value-type="float" office:value="4.54092369033116">
                <text:p>4.54092369033116</text:p>
                <draw:g>
                  <svg:desc>Condensation.N5:Condensation.N15</svg:desc>
                </draw:g>
              </table:table-cell>
              <table:table-cell office:value-type="float" office:value="4.54427901134222">
                <text:p>4.54427901134222</text:p>
                <draw:g>
                  <svg:desc>Condensation.O5:Condensation.O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94.964028776978">
                <text:p>294.964028776978</text:p>
              </table:table-cell>
              <table:table-cell office:value-type="float" office:value="344.53781512605">
                <text:p>344.53781512605</text:p>
              </table:table-cell>
              <table:table-cell office:value-type="float" office:value="364.985163204748">
                <text:p>364.9851632047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436.170212765957">
                <text:p>436.170212765957</text:p>
              </table:table-cell>
              <table:table-cell office:value-type="float" office:value="554.054054054054">
                <text:p>554.054054054054</text:p>
              </table:table-cell>
              <table:table-cell office:value-type="float" office:value="608.910891089109">
                <text:p>608.9108910891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518.987341772152">
                <text:p>518.987341772152</text:p>
              </table:table-cell>
              <table:table-cell office:value-type="float" office:value="694.915254237288">
                <text:p>694.915254237288</text:p>
              </table:table-cell>
              <table:table-cell office:value-type="float" office:value="783.43949044586">
                <text:p>783.439490445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573.426573426573">
                <text:p>573.426573426573</text:p>
              </table:table-cell>
              <table:table-cell office:value-type="float" office:value="796.116504854369">
                <text:p>796.116504854369</text:p>
              </table:table-cell>
              <table:table-cell office:value-type="float" office:value="914.498141263941">
                <text:p>914.4981412639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611.940298507463">
                <text:p>611.940298507463</text:p>
              </table:table-cell>
              <table:table-cell office:value-type="float" office:value="872.340425531915">
                <text:p>872.340425531915</text:p>
              </table:table-cell>
              <table:table-cell office:value-type="float" office:value="1016.52892561983">
                <text:p>1016.528925619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640.625">
                <text:p>640.625</text:p>
              </table:table-cell>
              <table:table-cell office:value-type="float" office:value="931.818181818182">
                <text:p>931.818181818182</text:p>
              </table:table-cell>
              <table:table-cell office:value-type="float" office:value="1098.21428571429">
                <text:p>1098.21428571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662.817551963049">
                <text:p>662.817551963049</text:p>
              </table:table-cell>
              <table:table-cell office:value-type="float" office:value="979.522184300341">
                <text:p>979.522184300341</text:p>
              </table:table-cell>
              <table:table-cell office:value-type="float" office:value="1165.08795669824">
                <text:p>1165.087956698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680.497925311203">
                <text:p>680.497925311203</text:p>
              </table:table-cell>
              <table:table-cell office:value-type="float" office:value="1018.63354037267">
                <text:p>1018.63354037267</text:p>
              </table:table-cell>
              <table:table-cell office:value-type="float" office:value="1220.84367245658">
                <text:p>1220.843672456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694.915254237288">
                <text:p>694.915254237288</text:p>
              </table:table-cell>
              <table:table-cell office:value-type="float" office:value="1051.28205128205">
                <text:p>1051.28205128205</text:p>
              </table:table-cell>
              <table:table-cell office:value-type="float" office:value="1268.0412371134">
                <text:p>1268.04123711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706.896551724138">
                <text:p>706.896551724138</text:p>
              </table:table-cell>
              <table:table-cell office:value-type="float" office:value="1078.94736842105">
                <text:p>1078.94736842105</text:p>
              </table:table-cell>
              <table:table-cell office:value-type="float" office:value="1308.51063829787">
                <text:p>1308.510638297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0" chart:interval-major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12.644cm" xlink:href=".." xlink:type="simple" chart:class="chart:scatter" chart:style-name="ch1">
        <chart:title svg:x="4.854cm" svg:y="0.388cm" chart:style-name="ch2">
          <text:p>Advanced Valve Characteristic</text:p>
        </chart:title>
        <chart:legend chart:legend-position="end" svg:x="13.299cm" svg:y="5.525cm" style:legend-expansion="high" chart:style-name="ch3"/>
        <chart:plot-area chart:style-name="ch4" svg:x="1.331cm" svg:y="1.419cm" svg:width="11.648cm" svg:height="9.992cm">
          <chart:coordinate-region svg:x="2.347cm" svg:y="1.618cm" svg:width="10.343cm" svg:height="9.146cm"/>
          <chart:axis chart:dimension="x" chart:name="primary-x" chart:style-name="ch5">
            <chart:title svg:x="5.421cm" svg:y="11.663cm" chart:style-name="ch2">
              <text:p><text:span text:style-name="T1">Reg. Valve Position (%)</text:span></text:p>
            </chart:title>
            <chart:grid chart:style-name="ch6" chart:class="major"/>
          </chart:axis>
          <chart:axis chart:dimension="y" chart:name="primary-y" chart:style-name="ch7">
            <chart:title svg:x="0.451cm" svg:y="7.645cm" chart:style-name="ch8">
              <text:p><text:span text:style-name="T1">Total Flow (kg/s)</text:span></text:p>
            </chart:title>
            <chart:grid chart:style-name="ch6" chart:class="major"/>
          </chart:axis>
          <chart:series chart:style-name="ch9" chart:values-cell-range-address="Condensation.M23:Condensation.M33" chart:label-cell-address="Condensation.M22:Condensation.M22" chart:class="chart:scatter">
            <chart:domain table:cell-range-address="Condensation.G23:Condensation.G33"/>
            <chart:data-point chart:repeated="11"/>
          </chart:series>
          <chart:series chart:style-name="ch10" chart:values-cell-range-address="Condensation.N23:Condensation.N33" chart:label-cell-address="Condensation.N22:Condensation.N22" chart:class="chart:scatter">
            <chart:data-point chart:repeated="11"/>
          </chart:series>
          <chart:series chart:style-name="ch11" chart:values-cell-range-address="Condensation.O23:Condensation.O33" chart:label-cell-address="Condensation.O22:Condensation.O22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1 Pump</text:p>
                <draw:g>
                  <svg:desc>Condensation.M22:Condensation.M22</svg:desc>
                </draw:g>
              </table:table-cell>
              <table:table-cell office:value-type="string">
                <text:p>2 Pumps</text:p>
                <draw:g>
                  <svg:desc>Condensation.N22:Condensation.N22</svg:desc>
                </draw:g>
              </table:table-cell>
              <table:table-cell office:value-type="string">
                <text:p>3 Pumps</text:p>
                <draw:g>
                  <svg:desc>Condensation.O22:Condensation.O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Condensation.G23:Condensation.G33</svg:desc>
                </draw:g>
              </table:table-cell>
              <table:table-cell office:value-type="float" office:value="1.27005507902121">
                <text:p>1.27005507902121</text:p>
                <draw:g>
                  <svg:desc>Condensation.M23:Condensation.M33</svg:desc>
                </draw:g>
              </table:table-cell>
              <table:table-cell office:value-type="float" office:value="1.27084241554047">
                <text:p>1.27084241554047</text:p>
                <draw:g>
                  <svg:desc>Condensation.N23:Condensation.N33</svg:desc>
                </draw:g>
              </table:table-cell>
              <table:table-cell office:value-type="float" office:value="1.27110507801978">
                <text:p>1.27110507801978</text:p>
                <draw:g>
                  <svg:desc>Condensation.O23:Condensation.O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18.298585256888">
                <text:p>118.298585256888</text:p>
              </table:table-cell>
              <table:table-cell office:value-type="float" office:value="125.543263532201">
                <text:p>125.543263532201</text:p>
              </table:table-cell>
              <table:table-cell office:value-type="float" office:value="128.159451465448">
                <text:p>128.1594514654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21.274373259053">
                <text:p>221.274373259053</text:p>
              </table:table-cell>
              <table:table-cell office:value-type="float" office:value="248.048399687744">
                <text:p>248.048399687744</text:p>
              </table:table-cell>
              <table:table-cell office:value-type="float" office:value="258.473427331887">
                <text:p>258.4734273318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311.723348593852">
                <text:p>311.723348593852</text:p>
              </table:table-cell>
              <table:table-cell office:value-type="float" office:value="367.624373312765">
                <text:p>367.624373312765</text:p>
              </table:table-cell>
              <table:table-cell office:value-type="float" office:value="390.996718621821">
                <text:p>390.9967186218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391.800246609124">
                <text:p>391.800246609124</text:p>
              </table:table-cell>
              <table:table-cell office:value-type="float" office:value="484.375">
                <text:p>484.375</text:p>
              </table:table-cell>
              <table:table-cell office:value-type="float" office:value="525.785990071704">
                <text:p>525.7859900717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463.192419825073">
                <text:p>463.192419825073</text:p>
              </table:table-cell>
              <table:table-cell office:value-type="float" office:value="598.399246704331">
                <text:p>598.399246704331</text:p>
              </table:table-cell>
              <table:table-cell office:value-type="float" office:value="662.899860917941">
                <text:p>662.8998609179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527.240044247787">
                <text:p>527.240044247787</text:p>
              </table:table-cell>
              <table:table-cell office:value-type="float" office:value="709.791511541325">
                <text:p>709.791511541325</text:p>
              </table:table-cell>
              <table:table-cell office:value-type="float" office:value="802.398989898989">
                <text:p>802.39898989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585.021041557075">
                <text:p>585.021041557075</text:p>
              </table:table-cell>
              <table:table-cell office:value-type="float" office:value="818.641884431358">
                <text:p>818.641884431358</text:p>
              </table:table-cell>
              <table:table-cell office:value-type="float" office:value="944.346164732521">
                <text:p>944.3461647325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637.41223671013">
                <text:p>637.41223671013</text:p>
              </table:table-cell>
              <table:table-cell office:value-type="float" office:value="925.036390101892">
                <text:p>925.036390101892</text:p>
              </table:table-cell>
              <table:table-cell office:value-type="float" office:value="1088.80639634495">
                <text:p>1088.806396344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685.134163871587">
                <text:p>685.134163871587</text:p>
              </table:table-cell>
              <table:table-cell office:value-type="float" office:value="1029.05721482548">
                <text:p>1029.05721482548</text:p>
              </table:table-cell>
              <table:table-cell office:value-type="float" office:value="1235.84701815039">
                <text:p>1235.847018150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728.784403669725">
                <text:p>728.784403669725</text:p>
              </table:table-cell>
              <table:table-cell office:value-type="float" office:value="1130.78291814947">
                <text:p>1130.78291814947</text:p>
              </table:table-cell>
              <table:table-cell office:value-type="float" office:value="1385.53779069767">
                <text:p>1385.537790697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00" chart:origin="0" chart:interval-major="20" chart:interval-minor-divisor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aximum="400" chart:origin="0" chart:interval-major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14cm" svg:height="13.061cm" xlink:href=".." xlink:type="simple" chart:class="chart:scatter" chart:style-name="ch1">
        <chart:legend chart:legend-position="end" svg:x="14.706cm" svg:y="5.235cm" style:legend-expansion="high" chart:style-name="ch2"/>
        <chart:plot-area chart:style-name="ch3" svg:x="0.342cm" svg:y="0.261cm" svg:width="14.022cm" svg:height="12.539cm">
          <chart:coordinate-region svg:x="1.167cm" svg:y="0.46cm" svg:width="12.909cm" svg:height="11.6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eedwater Startup'.I19:'Feedwater Startup'.I29" loext:label-string="&quot;Case 1&quot;" chart:class="chart:scatter">
            <chart:domain table:cell-range-address="'Feedwater Startup'.G19:'Feedwater Startup'.G29"/>
            <chart:data-point chart:repeated="11"/>
          </chart:series>
          <chart:series chart:style-name="ch8" chart:values-cell-range-address="'Feedwater Startup'.J19:'Feedwater Startup'.J29" loext:label-string="&quot;Case 2&quot;" chart:class="chart:scatter">
            <chart:data-point chart:repeated="11"/>
          </chart:series>
          <chart:series chart:style-name="ch9" chart:values-cell-range-address="'Feedwater Startup'.K19:'Feedwater Startup'.K29" loext:label-string="&quot;Case 3&quot;" chart:class="chart:scatter">
            <chart:data-point chart:repeated="11"/>
          </chart:series>
          <chart:series chart:style-name="ch10" chart:values-cell-range-address="'Feedwater Startup'.L19:'Feedwater Startup'.L29" loext:label-string="&quot;Case 4&quot;" chart:class="chart:scatter">
            <chart:data-point chart:repeated="11"/>
          </chart:series>
          <chart:series chart:style-name="ch11" chart:values-cell-range-address="'Feedwater Startup'.M19:'Feedwater Startup'.M29" loext:label-string="&quot;Case 5&quot;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ase 1</text:p>
              </table:table-cell>
              <table:table-cell office:value-type="string">
                <text:p>Case 2</text:p>
              </table:table-cell>
              <table:table-cell office:value-type="string">
                <text:p>Case 3</text:p>
              </table:table-cell>
              <table:table-cell office:value-type="string">
                <text:p>Case 4</text:p>
              </table:table-cell>
              <table:table-cell office:value-type="string">
                <text:p>Case 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'Feedwater Startup'.G19:'Feedwater Startup'.G29</svg:desc>
                </draw:g>
              </table:table-cell>
              <table:table-cell office:value-type="float" office:value="1.10207228037986">
                <text:p>1.10207228037986</text:p>
                <draw:g>
                  <svg:desc>'Feedwater Startup'.I19:'Feedwater Startup'.I29</svg:desc>
                </draw:g>
              </table:table-cell>
              <table:table-cell office:value-type="float" office:value="0.980901018200714">
                <text:p>0.980901018200714</text:p>
                <draw:g>
                  <svg:desc>'Feedwater Startup'.J19:'Feedwater Startup'.J29</svg:desc>
                </draw:g>
              </table:table-cell>
              <table:table-cell office:value-type="float" office:value="0.834038568564315">
                <text:p>0.834038568564315</text:p>
                <draw:g>
                  <svg:desc>'Feedwater Startup'.K19:'Feedwater Startup'.K29</svg:desc>
                </draw:g>
              </table:table-cell>
              <table:table-cell office:value-type="float" office:value="0.699406511887744">
                <text:p>0.699406511887744</text:p>
                <draw:g>
                  <svg:desc>'Feedwater Startup'.L19:'Feedwater Startup'.L29</svg:desc>
                </draw:g>
              </table:table-cell>
              <table:table-cell office:value-type="float" office:value="0.491173197534719">
                <text:p>0.491173197534719</text:p>
                <draw:g>
                  <svg:desc>'Feedwater Startup'.M19:'Feedwater Startup'.M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7034279301616">
                <text:p>10.7034279301616</text:p>
              </table:table-cell>
              <table:table-cell office:value-type="float" office:value="9.63640115302971">
                <text:p>9.63640115302971</text:p>
              </table:table-cell>
              <table:table-cell office:value-type="float" office:value="8.21733616263273">
                <text:p>8.21733616263273</text:p>
              </table:table-cell>
              <table:table-cell office:value-type="float" office:value="6.91591925071505">
                <text:p>6.91591925071505</text:p>
              </table:table-cell>
              <table:table-cell office:value-type="float" office:value="4.88886720486988">
                <text:p>4.888867204869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0.179421197307">
                <text:p>30.179421197307</text:p>
              </table:table-cell>
              <table:table-cell office:value-type="float" office:value="27.8212689688102">
                <text:p>27.8212689688102</text:p>
              </table:table-cell>
              <table:table-cell office:value-type="float" office:value="23.8694379748327">
                <text:p>23.8694379748327</text:p>
              </table:table-cell>
              <table:table-cell office:value-type="float" office:value="20.245087151481">
                <text:p>20.245087151481</text:p>
              </table:table-cell>
              <table:table-cell office:value-type="float" office:value="14.5164328589603">
                <text:p>14.5164328589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76.701558942936">
                <text:p>76.701558942936</text:p>
              </table:table-cell>
              <table:table-cell office:value-type="float" office:value="74.9967878533533">
                <text:p>74.9967878533533</text:p>
              </table:table-cell>
              <table:table-cell office:value-type="float" office:value="65.3817432513858">
                <text:p>65.3817432513858</text:p>
              </table:table-cell>
              <table:table-cell office:value-type="float" office:value="56.6199469582354">
                <text:p>56.6199469582354</text:p>
              </table:table-cell>
              <table:table-cell office:value-type="float" office:value="42.2514820842162">
                <text:p>42.25148208421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95.0087844549947">
                <text:p>95.0087844549947</text:p>
              </table:table-cell>
              <table:table-cell office:value-type="float" office:value="95.1685133152162">
                <text:p>95.1685133152162</text:p>
              </table:table-cell>
              <table:table-cell office:value-type="float" office:value="83.5434723377934">
                <text:p>83.5434723377934</text:p>
              </table:table-cell>
              <table:table-cell office:value-type="float" office:value="73.0194285831288">
                <text:p>73.0194285831288</text:p>
              </table:table-cell>
              <table:table-cell office:value-type="float" office:value="55.5082069569354">
                <text:p>55.50820695693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24.795017817913">
                <text:p>124.795017817913</text:p>
              </table:table-cell>
              <table:table-cell office:value-type="float" office:value="130.183760712475">
                <text:p>130.183760712475</text:p>
              </table:table-cell>
              <table:table-cell office:value-type="float" office:value="115.675904705044">
                <text:p>115.675904705044</text:p>
              </table:table-cell>
              <table:table-cell office:value-type="float" office:value="102.792350586509">
                <text:p>102.792350586509</text:p>
              </table:table-cell>
              <table:table-cell office:value-type="float" office:value="80.887175383485">
                <text:p>80.8871753834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160.805046174496">
                <text:p>160.805046174496</text:p>
              </table:table-cell>
              <table:table-cell office:value-type="float" office:value="176.593712209618">
                <text:p>176.593712209618</text:p>
              </table:table-cell>
              <table:table-cell office:value-type="float" office:value="159.49315126267">
                <text:p>159.49315126267</text:p>
              </table:table-cell>
              <table:table-cell office:value-type="float" office:value="145.031797593448">
                <text:p>145.031797593448</text:p>
              </table:table-cell>
              <table:table-cell office:value-type="float" office:value="120.113893658456">
                <text:p>120.1138936584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79.445730242637">
                <text:p>179.445730242637</text:p>
              </table:table-cell>
              <table:table-cell office:value-type="float" office:value="202.594358954121">
                <text:p>202.594358954121</text:p>
              </table:table-cell>
              <table:table-cell office:value-type="float" office:value="184.676690342219">
                <text:p>184.676690342219</text:p>
              </table:table-cell>
              <table:table-cell office:value-type="float" office:value="170.211379785578">
                <text:p>170.211379785578</text:p>
              </table:table-cell>
              <table:table-cell office:value-type="float" office:value="145.519247458603">
                <text:p>145.5192474586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">
                <text:p>55</text:p>
              </table:table-cell>
              <table:table-cell office:value-type="float" office:value="215.838830053451">
                <text:p>215.838830053451</text:p>
              </table:table-cell>
              <table:table-cell office:value-type="float" office:value="257.805769809554">
                <text:p>257.805769809554</text:p>
              </table:table-cell>
              <table:table-cell office:value-type="float" office:value="239.736742852349">
                <text:p>239.736742852349</text:p>
              </table:table-cell>
              <table:table-cell office:value-type="float" office:value="227.716601252555">
                <text:p>227.716601252555</text:p>
              </table:table-cell>
              <table:table-cell office:value-type="float" office:value="210.182135938564">
                <text:p>210.1821359385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233.60524391572">
                <text:p>233.60524391572</text:p>
              </table:table-cell>
              <table:table-cell office:value-type="float" office:value="287.151419707668">
                <text:p>287.151419707668</text:p>
              </table:table-cell>
              <table:table-cell office:value-type="float" office:value="269.914113737837">
                <text:p>269.914113737837</text:p>
              </table:table-cell>
              <table:table-cell office:value-type="float" office:value="260.751830221272">
                <text:p>260.751830221272</text:p>
              </table:table-cell>
              <table:table-cell office:value-type="float" office:value="252.208944619548">
                <text:p>252.2089446195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256.862801001294">
                <text:p>256.862801001294</text:p>
              </table:table-cell>
              <table:table-cell office:value-type="float" office:value="328.25234743516">
                <text:p>328.25234743516</text:p>
              </table:table-cell>
              <table:table-cell office:value-type="float" office:value="313.294365639699">
                <text:p>313.294365639699</text:p>
              </table:table-cell>
              <table:table-cell office:value-type="float" office:value="310.263286679064">
                <text:p>310.263286679064</text:p>
              </table:table-cell>
              <table:table-cell office:value-type="float" office:value="323.323934381752">
                <text:p>323.3239343817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00" chart:interval-major="1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3.483cm" svg:height="12.644cm" xlink:href=".." xlink:type="simple" chart:class="chart:scatter" chart:style-name="ch1">
        <chart:title svg:x="3.595cm" svg:y="0.388cm" chart:style-name="ch2">
          <text:p>Advanced Valve Characteristic</text:p>
        </chart:title>
        <chart:plot-area chart:style-name="ch3" svg:x="1.28cm" svg:y="1.419cm" svg:width="11.934cm" svg:height="9.992cm">
          <chart:coordinate-region svg:x="2.105cm" svg:y="1.618cm" svg:width="10.82cm" svg:height="9.146cm"/>
          <chart:axis chart:dimension="x" chart:name="primary-x" chart:style-name="ch4">
            <chart:title svg:x="5.513cm" svg:y="11.663cm" chart:style-name="ch2">
              <text:p><text:span text:style-name="T1">Reg. Valve Position (%)</text:span></text:p>
            </chart:title>
            <chart:grid chart:style-name="ch5" chart:class="major"/>
          </chart:axis>
          <chart:axis chart:dimension="y" chart:name="primary-y" chart:style-name="ch6">
            <chart:title svg:x="0.451cm" svg:y="7.645cm" chart:style-name="ch7">
              <text:p><text:span text:style-name="T1">Total Flow (kg/s)</text:span></text:p>
            </chart:title>
            <chart:grid chart:style-name="ch5" chart:class="major"/>
          </chart:axis>
          <chart:series chart:style-name="ch8" chart:values-cell-range-address="'Feedwater Main'.K7:'Feedwater Main'.K17" chart:label-cell-address="'Feedwater Main'.K6:'Feedwater Main'.K6" chart:class="chart:scatter">
            <chart:domain table:cell-range-address="'Feedwater Main'.G7:'Feedwater Main'.G17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Flow</text:p>
                <draw:g>
                  <svg:desc>'Feedwater Main'.K6:'Feedwater Main'.K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'Feedwater Main'.G7:'Feedwater Main'.G17</svg:desc>
                </draw:g>
              </table:table-cell>
              <table:table-cell office:value-type="float" office:value="0.998633347957078">
                <text:p>0.998633347957078</text:p>
                <draw:g>
                  <svg:desc>'Feedwater Main'.K7:'Feedwater Main'.K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87.9621792856625">
                <text:p>87.9621792856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57.022296086853">
                <text:p>157.0222960868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212.681985616558">
                <text:p>212.6819856165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258.496633325635">
                <text:p>258.4966333256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296.866073614625">
                <text:p>296.866073614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329.468774059146">
                <text:p>329.4687740591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357.513935496553">
                <text:p>357.5139354965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381.894775521988">
                <text:p>381.8947755219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403.285413356">
                <text:p>403.2854133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422.204166908479">
                <text:p>422.20416690847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