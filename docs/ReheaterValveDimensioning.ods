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ext-properties fo:color="#55308d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2386in" svg:height="3.5449in" svg:x="2.3957in" svg:y="3.3567in">
            <draw:object draw:notify-on-update-of-ranges="Sheet1.H5:Sheet1.H5 Sheet1.H6:Sheet1.H14 Sheet1.J5:Sheet1.J5 Sheet1.J6:Sheet1.J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or startup, the steam reheater has to be operated with way lower steam temperatures 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sure the LP part is not heated up too fast, there is not much steam flow to cool 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steam that goes into the reheater.</text:p>
          </table:table-cell>
          <table:table-cell table:number-columns-repeated="6"/>
          <table:table-cell office:value-type="string" calcext:value-type="string">
            <text:p>Caclulations use startup p-diff!</text:p>
          </table:table-cell>
          <table:table-cell table:number-columns-repeated="4"/>
          <table:table-cell office:value-type="string" calcext:value-type="string">
            <text:p>Calculation uses full load p-diff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rim Valve</text:p>
          </table:table-cell>
          <table:table-cell/>
          <table:table-cell office:value-type="string" calcext:value-type="string">
            <text:p>Main Valve setting variant</text:p>
          </table:table-cell>
          <table:table-cell table:number-columns-repeated="2"/>
          <table:table-cell office:value-type="string" calcext:value-type="string">
            <text:p>Main Val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up</text:p>
          </table:table-cell>
          <table:table-cell/>
          <table:table-cell office:value-type="string" calcext:value-type="string">
            <text:p>Full Load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Flow on 10 %</text:p>
          </table:table-cell>
          <table:table-cell office:value-type="string" calcext:value-type="string">
            <text:p>Flow on 100%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R/2 (2 valves)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Pressure:</text:p>
          </table:table-cell>
          <table:table-cell table:style-name="ce1" office:value-type="float" office:value="5500000" calcext:value-type="float">
            <text:p>5.50E+06</text:p>
          </table:table-cell>
          <table:table-cell office:value-type="string" calcext:value-type="string">
            <text:p>Pa</text:p>
          </table:table-cell>
          <table:table-cell table:style-name="ce1" office:value-type="float" office:value="5300000" calcext:value-type="float">
            <text:p>5.30E+06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18]/([.$B$17]*[.H6]/100)-[.$B$19]" office:value-type="float" office:value="2596695.65217391" calcext:value-type="float">
            <text:p>2596695.65217391</text:p>
          </table:table-cell>
          <table:table-cell table:formula="of:=[.$B$6]/([.E$9]+[.$B$14]+[.$I6])" office:value-type="float" office:value="2.04377722343574" calcext:value-type="float">
            <text:p>2.04377722343574</text:p>
          </table:table-cell>
          <table:table-cell table:formula="of:=[.$B$6]/([.F$9]+[.$B$14]+[.$I6])" office:value-type="float" office:value="2.11693514647852" calcext:value-type="float">
            <text:p>2.1169351464785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$10]/([.$B$9]*[.M6]/100)-[.$B$11])/2" office:value-type="float" office:value="993000" calcext:value-type="float">
            <text:p>993000</text:p>
          </table:table-cell>
          <table:table-cell table:formula="of:=[.$D$6]/([.N6]+[.$B$14]+[.$D$17])" office:value-type="float" office:value="5.25539766848313" calcext:value-type="float">
            <text:p>5.255397668483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in parallel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18]/([.$B$17]*[.H7]/100)-[.$B$19]" office:value-type="float" office:value="1292347.82608696" calcext:value-type="float">
            <text:p>1292347.82608696</text:p>
          </table:table-cell>
          <table:table-cell table:formula="of:=[.$B$6]/([.E$9]+[.$B$14]+[.$I7])" office:value-type="float" office:value="3.96611402342672" calcext:value-type="float">
            <text:p>3.96611402342672</text:p>
          </table:table-cell>
          <table:table-cell table:formula="of:=[.$B$6]/([.F$9]+[.$B$14]+[.$I7])" office:value-type="float" office:value="4.25121487286683" calcext:value-type="float">
            <text:p>4.2512148728668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$10]/([.$B$9]*[.M7]/100)-[.$B$11])/2" office:value-type="float" office:value="93000" calcext:value-type="float">
            <text:p>93000</text:p>
          </table:table-cell>
          <table:table-cell table:formula="of:=[.$D$6]/([.N7]+[.$B$14]+[.$D$17])" office:value-type="float" office:value="48.8537992946457" calcext:value-type="float">
            <text:p>48.8537992946457</text:p>
          </table:table-cell>
        </table:table-row>
        <table:table-row table:style-name="ro1">
          <table:table-cell office:value-type="string" calcext:value-type="string">
            <text:p>Reheater Steam Valve Characteristic</text:p>
          </table:table-cell>
          <table:table-cell table:number-columns-repeated="2"/>
          <table:table-cell office:value-type="string" calcext:value-type="string">
            <text:p>On 10 %: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B$18]/([.$B$17]*[.H8]/100)-[.$B$19]" office:value-type="float" office:value="509739.130434783" calcext:value-type="float">
            <text:p>509739.130434783</text:p>
          </table:table-cell>
          <table:table-cell table:formula="of:=[.$B$6]/([.E$9]+[.$B$14]+[.$I8])" office:value-type="float" office:value="9.10386320455985" calcext:value-type="float">
            <text:p>9.10386320455985</text:p>
          </table:table-cell>
          <table:table-cell table:formula="of:=[.$B$6]/([.F$9]+[.$B$14]+[.$I8])" office:value-type="float" office:value="10.7602796822102" calcext:value-type="float">
            <text:p>10.760279682210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$10]/([.$B$9]*[.M8]/100)-[.$B$11])/2" office:value-type="float" office:value="43000" calcext:value-type="float">
            <text:p>43000</text:p>
          </table:table-cell>
          <table:table-cell table:formula="of:=[.$D$6]/([.N8]+[.$B$14]+[.$D$17])" office:value-type="float" office:value="90.6184953910199" calcext:value-type="float">
            <text:p>90.6184953910199</text:p>
          </table:table-cell>
        </table:table-row>
        <table:table-row table:style-name="ro1">
          <table:table-cell office:value-type="string" calcext:value-type="string">
            <text:p>flowOpe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g/s</text:p>
          </table:table-cell>
          <table:table-cell table:formula="of:=[.$B$10]/([.$B$9]*10/100)-[.$B$11]" office:value-type="float" office:value="186000" calcext:value-type="float">
            <text:p>186000</text:p>
          </table:table-cell>
          <table:table-cell table:formula="of:=[.D9]/2" office:value-type="float" office:value="93000" calcext:value-type="float">
            <text:p>9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18]/([.$B$17]*[.H9]/100)-[.$B$19]" office:value-type="float" office:value="248869.565217391" calcext:value-type="float">
            <text:p>248869.565217391</text:p>
          </table:table-cell>
          <table:table-cell table:formula="of:=[.$B$6]/([.E$9]+[.$B$14]+[.$I9])" office:value-type="float" office:value="16.0223933529233" calcext:value-type="float">
            <text:p>16.0223933529233</text:p>
          </table:table-cell>
          <table:table-cell table:formula="of:=[.$B$6]/([.F$9]+[.$B$14]+[.$I9])" office:value-type="float" office:value="21.9763038115423" calcext:value-type="float">
            <text:p>21.976303811542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$10]/([.$B$9]*[.M9]/100)-[.$B$11])/2" office:value-type="float" office:value="26333.3333333333" calcext:value-type="float">
            <text:p>26333.3333333333</text:p>
          </table:table-cell>
          <table:table-cell table:formula="of:=[.$D$6]/([.N9]+[.$B$14]+[.$D$17])" office:value-type="float" office:value="126.732741890768" calcext:value-type="float">
            <text:p>126.732741890768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5000000" calcext:value-type="float">
            <text:p>5.00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n 100 %: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$B$18]/([.$B$17]*[.H10]/100)-[.$B$19]" office:value-type="float" office:value="118434.782608696" calcext:value-type="float">
            <text:p>118434.782608696</text:p>
          </table:table-cell>
          <table:table-cell table:formula="of:=[.$B$6]/([.E$9]+[.$B$14]+[.$I10])" office:value-type="float" office:value="25.8416407909789" calcext:value-type="float">
            <text:p>25.8416407909789</text:p>
          </table:table-cell>
          <table:table-cell table:formula="of:=[.$B$6]/([.F$9]+[.$B$14]+[.$I10])" office:value-type="float" office:value="45.8965241999855" calcext:value-type="float">
            <text:p>45.89652419998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$B$10]/([.$B$9]*[.M10]/100)-[.$B$11])/2" office:value-type="float" office:value="18000" calcext:value-type="float">
            <text:p>18000</text:p>
          </table:table-cell>
          <table:table-cell table:formula="of:=[.$D$6]/([.N10]+[.$B$14]+[.$D$17])" office:value-type="float" office:value="158.270579070371" calcext:value-type="float">
            <text:p>158.270579070371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1" office:value-type="float" office:value="14000" calcext:value-type="float">
            <text:p>1.40E+04</text:p>
          </table:table-cell>
          <table:table-cell office:value-type="string" calcext:value-type="string">
            <text:p>Pa*s/kg</text:p>
          </table:table-cell>
          <table:table-cell table:formula="of:=[.$B$10]/([.$B$9]*100/100)-[.$B$11]" office:value-type="float" office:value="6000" calcext:value-type="float">
            <text:p>6000</text:p>
          </table:table-cell>
          <table:table-cell table:formula="of:=[.D11]/2" office:value-type="float" office:value="3000" calcext:value-type="float">
            <text:p>3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18]/([.$B$17]*[.H11]/100)-[.$B$19]" office:value-type="float" office:value="53217.3913043478" calcext:value-type="float">
            <text:p>53217.3913043478</text:p>
          </table:table-cell>
          <table:table-cell table:formula="of:=[.$B$6]/([.E$9]+[.$B$14]+[.$I11])" office:value-type="float" office:value="37.2584825636192" calcext:value-type="float">
            <text:p>37.2584825636192</text:p>
          </table:table-cell>
          <table:table-cell table:formula="of:=[.$B$6]/([.F$9]+[.$B$14]+[.$I11])" office:value-type="float" office:value="100.700525394046" calcext:value-type="float">
            <text:p>100.70052539404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$B$10]/([.$B$9]*[.M11]/100)-[.$B$11])/2" office:value-type="float" office:value="13000" calcext:value-type="float">
            <text:p>13000</text:p>
          </table:table-cell>
          <table:table-cell table:formula="of:=[.$D$6]/([.N11]+[.$B$14]+[.$D$17])" office:value-type="float" office:value="186.050061050061" calcext:value-type="float">
            <text:p>186.050061050061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B$18]/([.$B$17]*[.H12]/100)-[.$B$19]" office:value-type="float" office:value="40173.9130434783" calcext:value-type="float">
            <text:p>40173.9130434783</text:p>
          </table:table-cell>
          <table:table-cell table:formula="of:=[.$B$6]/([.E$9]+[.$B$14]+[.$I12])" office:value-type="float" office:value="40.8697337813388" calcext:value-type="float">
            <text:p>40.8697337813388</text:p>
          </table:table-cell>
          <table:table-cell table:formula="of:=[.$B$6]/([.F$9]+[.$B$14]+[.$I12])" office:value-type="float" office:value="132.294499058774" calcext:value-type="float">
            <text:p>132.29449905877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$B$10]/([.$B$9]*[.M12]/100)-[.$B$11])/2" office:value-type="float" office:value="9666.66666666667" calcext:value-type="float">
            <text:p>9666.66666666667</text:p>
          </table:table-cell>
          <table:table-cell table:formula="of:=[.$D$6]/([.N12]+[.$B$14]+[.$D$17])" office:value-type="float" office:value="210.705231620189" calcext:value-type="float">
            <text:p>210.705231620189</text:p>
          </table:table-cell>
        </table:table-row>
        <table:table-row table:style-name="ro1">
          <table:table-cell office:value-type="string" calcext:value-type="string">
            <text:p>Reheater Trip Valve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formula="of:=[.$B$18]/([.$B$17]*[.H13]/100)-[.$B$19]" office:value-type="float" office:value="22782.6086956522" calcext:value-type="float">
            <text:p>22782.6086956522</text:p>
          </table:table-cell>
          <table:table-cell table:formula="of:=[.$B$6]/([.E$9]+[.$B$14]+[.$I13])" office:value-type="float" office:value="46.9352923716236" calcext:value-type="float">
            <text:p>46.9352923716236</text:p>
          </table:table-cell>
          <table:table-cell table:formula="of:=[.$B$6]/([.F$9]+[.$B$14]+[.$I13])" office:value-type="float" office:value="227.436174038116" calcext:value-type="float">
            <text:p>227.43617403811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[.$B$10]/([.$B$9]*[.M13]/100)-[.$B$11])/2" office:value-type="float" office:value="7285.71428571429" calcext:value-type="float">
            <text:p>7285.71428571429</text:p>
          </table:table-cell>
          <table:table-cell table:formula="of:=[.$D$6]/([.N13]+[.$B$14]+[.$D$17])" office:value-type="float" office:value="232.735108007855" calcext:value-type="float">
            <text:p>232.735108007855</text:p>
          </table:table-cell>
        </table:table-row>
        <table:table-row table:style-name="ro1">
          <table:table-cell office:value-type="string" calcext:value-type="string">
            <text:p>charSimple</text:p>
          </table:table-cell>
          <table:table-cell table:style-name="ce1" office:value-type="float" office:value="1400" calcext:value-type="float">
            <text:p>1.40E+03</text:p>
          </table:table-cell>
          <table:table-cell office:value-type="string" calcext:value-type="string">
            <text:p>Pa*s/kg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$B$18]/([.$B$17]*[.H14]/100)-[.$B$19]" office:value-type="float" office:value="14086.9565217391" calcext:value-type="float">
            <text:p>14086.9565217391</text:p>
          </table:table-cell>
          <table:table-cell table:formula="of:=[.$B$6]/([.E$9]+[.$B$14]+[.$I14])" office:value-type="float" office:value="50.6973388906701" calcext:value-type="float">
            <text:p>50.6973388906701</text:p>
          </table:table-cell>
          <table:table-cell table:style-name="ce2" table:formula="of:=[.$B$6]/([.F$9]+[.$B$14]+[.$I14])" office:value-type="float" office:value="355.13756316676" calcext:value-type="float">
            <text:p>355.137563166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[.$B$10]/([.$B$9]*[.M14]/100)-[.$B$11])/2" office:value-type="float" office:value="5500" calcext:value-type="float">
            <text:p>5500</text:p>
          </table:table-cell>
          <table:table-cell table:formula="of:=[.$D$6]/([.N14]+[.$B$14]+[.$D$17])" office:value-type="float" office:value="252.53780816242" calcext:value-type="float">
            <text:p>252.53780816242</text:p>
          </table:table-cell>
        </table:table-row>
        <table:table-row table:style-name="ro1">
          <table:table-cell/>
          <table:table-cell table:style-name="ce1"/>
          <table:table-cell table:number-columns-repeated="10"/>
          <table:table-cell office:value-type="float" office:value="90" calcext:value-type="float">
            <text:p>90</text:p>
          </table:table-cell>
          <table:table-cell table:formula="of:=([.$B$10]/([.$B$9]*[.M15]/100)-[.$B$11])/2" office:value-type="float" office:value="4111.11111111111" calcext:value-type="float">
            <text:p>4111.11111111111</text:p>
          </table:table-cell>
          <table:table-cell table:formula="of:=[.$D$6]/([.N15]+[.$B$14]+[.$D$17])" office:value-type="float" office:value="270.434825478209" calcext:value-type="float">
            <text:p>270.434825478209</text:p>
          </table:table-cell>
        </table:table-row>
        <table:table-row table:style-name="ro1">
          <table:table-cell office:value-type="string" calcext:value-type="string">
            <text:p>Reheater Trim Valve</text:p>
          </table:table-cell>
          <table:table-cell table:number-columns-repeated="2"/>
          <table:table-cell office:value-type="string" calcext:value-type="string">
            <text:p>On 100%: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B$10]/([.$B$9]*[.M16]/100)-[.$B$11])/2" office:value-type="float" office:value="3000" calcext:value-type="float">
            <text:p>3000</text:p>
          </table:table-cell>
          <table:table-cell table:style-name="ce3" table:formula="of:=[.$D$6]/([.N16]+[.$B$14]+[.$D$17])" office:value-type="float" office:value="286.688617121355" calcext:value-type="float">
            <text:p>286.688617121355</text:p>
          </table:table-cell>
        </table:table-row>
        <table:table-row table:style-name="ro1">
          <table:table-cell office:value-type="string" calcext:value-type="string">
            <text:p>flowOpen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$B$18]/([.$B$17]*100/100)-[.$B$19]" office:value-type="float" office:value="14086.9565217391" calcext:value-type="float">
            <text:p>14086.95652173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6000000" calcext:value-type="float">
            <text:p>6.00E+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1" office:value-type="float" office:value="12000" calcext:value-type="float">
            <text:p>1.20E+04</text:p>
          </table:table-cell>
          <table:table-cell table:number-columns-repeated="5"/>
          <table:table-cell>
            <draw:frame draw:z-index="1" draw:style-name="gr1" draw:text-style-name="P1" svg:width="4.2386in" svg:height="3.4406in" svg:x="0.6941in" svg:y="0.0945in">
              <draw:object draw:notify-on-update-of-ranges="Sheet1.M6:Sheet1.M16 Sheet1.O5:Sheet1.O5 Sheet1.O6:Sheet1.O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ull Load reqires 283 kg/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2:36:40.802766831</meta:creation-date>
    <dc:date>2026-06-07T15:18:03.138727131</dc:date>
    <meta:editing-duration>PT1H11M19S</meta:editing-duration>
    <meta:editing-cycles>5</meta:editing-cycles>
    <meta:generator>LibreOffice/25.2.3.2$Linux_X86_64 LibreOffice_project/520$Build-2</meta:generator>
    <meta:document-statistic meta:table-count="1" meta:cell-count="1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0.767cm" svg:height="9.005cm" xlink:href=".." xlink:type="simple" chart:class="chart:scatter" chart:style-name="ch1">
        <chart:title svg:x="2.007cm" svg:y="0.315cm" chart:style-name="ch2">
          <text:p><text:span text:style-name="T1">Trim Valve Startup Characteristic
</text:span><text:span text:style-name="T1">on 10 % Opening of main valves</text:span></text:p>
        </chart:title>
        <chart:plot-area chart:style-name="ch3" svg:x="1.226cm" svg:y="1.756cm" svg:width="9.326cm" svg:height="6.088cm">
          <chart:coordinate-region svg:x="1.86cm" svg:y="1.955cm" svg:width="8.403cm" svg:height="5.242cm"/>
          <chart:axis chart:dimension="x" chart:name="primary-x" chart:style-name="ch4">
            <chart:title svg:x="4.138cm" svg:y="8.024cm" chart:style-name="ch2">
              <text:p><text:span text:style-name="T2">Trim Valve Opening (%)</text:span></text:p>
            </chart:title>
          </chart:axis>
          <chart:axis chart:dimension="y" chart:name="primary-y" chart:style-name="ch5">
            <chart:title svg:x="0.451cm" svg:y="5.633cm" chart:style-name="ch6">
              <text:p><text:span text:style-name="T2">Flow (kg/s)</text:span></text:p>
            </chart:title>
            <chart:grid chart:style-name="ch7" chart:class="major"/>
          </chart:axis>
          <chart:series chart:style-name="ch8" chart:values-cell-range-address="Sheet1.J6:Sheet1.J14" chart:label-cell-address="Sheet1.J5:Sheet1.J5" chart:class="chart:scatter">
            <chart:domain table:cell-range-address="Sheet1.H6:Sheet1.H1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low on 10 %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6:Sheet1.H14</svg:desc>
                </draw:g>
              </table:table-cell>
              <table:table-cell office:value-type="float" office:value="2.04377722343574">
                <text:p>2.04377722343574</text:p>
                <draw:g>
                  <svg:desc>Sheet1.J6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6611402342672">
                <text:p>3.9661140234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10386320455985">
                <text:p>9.10386320455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.0223933529233">
                <text:p>16.0223933529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5.8416407909789">
                <text:p>25.8416407909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7.2584825636192">
                <text:p>37.2584825636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0.8697337813388">
                <text:p>40.8697337813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46.9352923716236">
                <text:p>46.935292371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0.6973388906701">
                <text:p>50.697338890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0.767cm" svg:height="8.74cm" xlink:href=".." xlink:type="simple" chart:class="chart:scatter" chart:style-name="ch1">
        <chart:title svg:x="1.872cm" svg:y="0.177cm" chart:style-name="ch2">
          <text:p><text:span text:style-name="T1">Full Load Main Valve Characteristic</text:span></text:p>
        </chart:title>
        <chart:plot-area chart:style-name="ch3" svg:x="1.035cm" svg:y="1.098cm" svg:width="9.516cm" svg:height="6.485cm">
          <chart:coordinate-region svg:x="1.86cm" svg:y="1.297cm" svg:width="8.402cm" svg:height="5.639cm"/>
          <chart:axis chart:dimension="x" chart:name="primary-x" chart:style-name="ch4">
            <chart:title svg:x="4.015cm" svg:y="7.757cm" chart:style-name="ch5">
              <text:p><text:span text:style-name="T2">Main Valve Opening (%)</text:span></text:p>
            </chart:title>
          </chart:axis>
          <chart:axis chart:dimension="y" chart:name="primary-y" chart:style-name="ch6">
            <chart:title svg:x="0.26cm" svg:y="5.173cm" chart:style-name="ch7">
              <text:p><text:span text:style-name="T3">Flow (kg/s)</text:span></text:p>
            </chart:title>
            <chart:grid chart:style-name="ch8" chart:class="major"/>
          </chart:axis>
          <chart:series chart:style-name="ch9" chart:values-cell-range-address="Sheet1.O6:Sheet1.O16" chart:label-cell-address="Sheet1.O5:Sheet1.O5" chart:class="chart:scatter">
            <chart:domain table:cell-range-address="Sheet1.M6:Sheet1.M16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low</text:p>
                <draw:g>
                  <svg:desc>Sheet1.O5:Sheet1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6:Sheet1.M16</svg:desc>
                </draw:g>
              </table:table-cell>
              <table:table-cell office:value-type="float" office:value="5.25539766848313">
                <text:p>5.25539766848313</text:p>
                <draw:g>
                  <svg:desc>Sheet1.O6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.8537992946457">
                <text:p>48.8537992946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0.6184953910199">
                <text:p>90.6184953910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6.732741890768">
                <text:p>126.732741890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58.270579070371">
                <text:p>158.270579070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86.050061050061">
                <text:p>186.050061050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0.705231620189">
                <text:p>210.70523162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32.735108007855">
                <text:p>232.735108007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52.53780816242">
                <text:p>252.53780816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70.434825478209">
                <text:p>270.43482547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86.688617121355">
                <text:p>286.68861712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